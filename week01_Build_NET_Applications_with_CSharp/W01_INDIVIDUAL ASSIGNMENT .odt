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  <style:font-face style:name="Courier New" svg:font-family="Courier New" style:font-family-generic="modern" style:font-pitch="fixed" svg:panose-1="2 7 3 9 2 2 5 2 4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style:font-name="MS Gothic" style:font-name-asian="MS Gothic" style:font-name-complex="MS Gothic"/>
    </style:style>
    <style:style style:name="T16" style:parent-style-name="DefaultParagraphFont" style:family="text">
      <style:text-properties style:font-name="Calibri" style:font-name-complex="Calibri"/>
    </style:style>
    <style:style style:name="T17" style:parent-style-name="DefaultParagraphFont" style:family="text">
      <style:text-properties style:font-name="MS Gothic" style:font-name-asian="MS Gothic" style:font-name-complex="MS Gothic"/>
    </style:style>
    <style:style style:name="T18" style:parent-style-name="DefaultParagraphFont" style:family="text">
      <style:text-properties style:font-name="Calibri" style:font-name-complex="Calibri"/>
    </style:style>
    <style:style style:name="T19" style:parent-style-name="DefaultParagraphFont" style:family="text">
      <style:text-properties style:font-name="MS Gothic" style:font-name-asian="MS Gothic" style:font-name-complex="MS Gothic"/>
    </style:style>
    <style:style style:name="T20" style:parent-style-name="DefaultParagraphFont" style:family="text">
      <style:text-properties style:font-name="Calibri" style:font-name-complex="Calibri"/>
    </style:style>
    <style:style style:name="T21" style:parent-style-name="DefaultParagraphFont" style:family="text">
      <style:text-properties style:font-name="MS Gothic" style:font-name-asian="MS Gothic" style:font-name-complex="MS Gothic"/>
    </style:style>
    <style:style style:name="T22" style:parent-style-name="DefaultParagraphFont" style:family="text">
      <style:text-properties style:font-name="Calibri" style:font-name-complex="Calibri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2" style:family="paragraph"/>
    <style:style style:name="P26" style:parent-style-name="Normal" style:list-style-name="LFO2" style:family="paragraph"/>
    <style:style style:name="P27" style:parent-style-name="Normal" style:list-style-name="LFO2" style:family="paragraph"/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style:font-name="MS Gothic" style:font-name-asian="MS Gothic" style:font-name-complex="MS Gothic"/>
    </style:style>
    <style:style style:name="T32" style:parent-style-name="DefaultParagraphFont" style:family="text">
      <style:text-properties style:font-name="Calibri" style:font-name-complex="Calibri"/>
    </style:style>
    <style:style style:name="T33" style:parent-style-name="DefaultParagraphFont" style:family="text">
      <style:text-properties style:font-name="MS Gothic" style:font-name-asian="MS Gothic" style:font-name-complex="MS Gothic"/>
    </style:style>
    <style:style style:name="T34" style:parent-style-name="DefaultParagraphFont" style:family="text">
      <style:text-properties style:font-name="Calibri" style:font-name-complex="Calibri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Think of the assignment like this:</text:p>
      <text:p text:style-name="Normal">Your teacher is saying: “Show me that you can build two small .NET programs.”</text:p>
      <text:p text:style-name="Normal">One program is like a little calculator that reads sales files and writes a sales report.</text:p>
      <text:p text:style-name="Normal">The other program is like a tiny pizza menu website/API where someone can ask for pizzas, add a pizza, change a pizza, or delete a pizza.</text:p>
      <text:p text:style-name="Normal">To get full points, you need both parts working.</text:p>
      <text:p text:style-name="Normal"><text:span text:style-name="T2">What The Assignment Wants</text:span></text:p>
      <text:list text:style-name="LFO1" text:continue-numbering="true">
        <text:list-item>
          <text:p text:style-name="P3">Learn basic C# and .NET.</text:p>
        </text:list-item>
        <text:list-item>
          <text:p text:style-name="P4">Create a .NET project.</text:p>
        </text:list-item>
        <text:list-item>
          <text:p text:style-name="P5">Build a Web API using ASP.NET Core controllers.</text:p>
        </text:list-item>
        <text:list-item>
          <text:p text:style-name="P6">Make the pizza API do CRUD:</text:p>
          <text:list text:continue-numbering="true">
            <text:list-item>
              <text:p text:style-name="P7">Create a pizza</text:p>
            </text:list-item>
            <text:list-item>
              <text:p text:style-name="P8">Read/get pizzas</text:p>
            </text:list-item>
            <text:list-item>
              <text:p text:style-name="P9">Update a pizza</text:p>
            </text:list-item>
            <text:list-item>
              <text:p text:style-name="P10">Delete a pizza</text:p>
            </text:list-item>
          </text:list>
        </text:list-item>
        <text:list-item>
          <text:p text:style-name="P11">Add another function that works with files and folders.</text:p>
        </text:list-item>
        <text:list-item>
          <text:p text:style-name="P12">Push everything to GitHub.</text:p>
        </text:list-item>
        <text:list-item>
          <text:p text:style-name="P13">Submit the GitHub link and short notes/evidence in Canvas.</text:p>
        </text:list-item>
      </text:list>
      <text:p text:style-name="Normal">CRUD is just a fancy word:</text:p>
      <text:p text:style-name="Normal">C = Create</text:p>
      <text:p text:style-name="Normal">R = Read</text:p>
      <text:p text:style-name="Normal">U = Update</text:p>
      <text:p text:style-name="Normal">D = Delete</text:p>
      <text:p text:style-name="Normal">Like a pizza list:</text:p>
      <text:p text:style-name="Normal">Add pizza</text:p>
      <text:p text:style-name="Normal">See pizza</text:p>
      <text:soft-page-break/>
      <text:p text:style-name="Normal">Change pizza</text:p>
      <text:p text:style-name="Normal">Remove pizza</text:p>
      <text:p text:style-name="Normal"><text:span text:style-name="T14">What We Built</text:span></text:p>
      <text:p text:style-name="Normal">Inside your [week01](C:/Users/olaku/OneDrive/Documents/CSE325_.NET Software Development/week01) folder, we made two projects:</text:p>
      <text:p text:style-name="Normal">week01</text:p>
      <text:p text:style-name="Normal"><text:span text:style-name="T15">├</text:span><text:span text:style-name="T16">──</text:span><text:s/>SalesSummary</text:p>
      <text:p text:style-name="Normal"><text:span text:style-name="T17">├</text:span><text:span text:style-name="T18">──</text:span><text:s/>PizzaApi</text:p>
      <text:p text:style-name="Normal"><text:span text:style-name="T19">├</text:span><text:span text:style-name="T20">──</text:span><text:s/>Data</text:p>
      <text:p text:style-name="Normal"><text:span text:style-name="T21">├</text:span><text:span text:style-name="T22">──</text:span><text:s/>Week01Assignment.sln</text:p>
      <text:p text:style-name="Normal">└── README.md</text:p>
      <text:p text:style-name="Normal"><text:span text:style-name="T23">Week01Assignment.sln</text:span></text:p>
      <text:p text:style-name="Normal">This is the “big folder manager” for Visual Studio/.NET.</text:p>
      <text:p text:style-name="Normal">It knows that your Week 01 assignment has two projects:</text:p>
      <text:p text:style-name="Normal">SalesSummary</text:p>
      <text:p text:style-name="Normal">PizzaApi</text:p>
      <text:p text:style-name="Normal">When you run:</text:p>
      <text:p text:style-name="Normal">dotnet build Week01Assignment.sln</text:p>
      <text:p text:style-name="Normal">.NET checks/builds both projects together.</text:p>
      <text:p text:style-name="Normal"><text:span text:style-name="T24">SalesSummary Folder</text:span></text:p>
      <text:p text:style-name="Normal">This is the file/report part of the assignment.</text:p>
      <text:p text:style-name="Normal">Think of it like a tiny robot that:</text:p>
      <text:list text:style-name="LFO2" text:continue-numbering="true">
        <text:list-item>
          <text:p text:style-name="P25">Looks inside a folder for sales files.</text:p>
        </text:list-item>
        <text:list-item>
          <text:p text:style-name="P26">Reads the money amounts.</text:p>
        </text:list-item>
        <text:list-item>
          <text:p text:style-name="P27">Adds them up.</text:p>
        </text:list-item>
        <text:list-item>
          <text:p text:style-name="P28">Writes a report.</text:p>
        </text:list-item>
      </text:list>
      <text:soft-page-break/>
      <text:p text:style-name="Normal">Main file:</text:p>
      <text:p text:style-name="Normal">[Program.cs](C:/Users/olaku/OneDrive/Documents/CSE325_.NET Software Development/week01/SalesSummary/Program.cs)</text:p>
      <text:p text:style-name="Normal">That file does the work.</text:p>
      <text:p text:style-name="Normal">It creates/uses this folder:</text:p>
      <text:p text:style-name="Normal">Data/SalesFiles</text:p>
      <text:p text:style-name="Normal">Then it reads files like:</text:p>
      <text:p text:style-name="Normal">pizza-sales.csv</text:p>
      <text:p text:style-name="Normal">side-sales.csv</text:p>
      <text:p text:style-name="Normal">Each CSV file is like a small spreadsheet:</text:p>
      <text:p text:style-name="Normal">Product,Amount</text:p>
      <text:p text:style-name="Normal">Margherita Pizza,18.99</text:p>
      <text:p text:style-name="Normal">Pepperoni Pizza,22.49</text:p>
      <text:p text:style-name="Normal">Then the program creates:</text:p>
      <text:p text:style-name="Normal">Data/sales-summary.txt</text:p>
      <text:p text:style-name="Normal">That report says:</text:p>
      <text:p text:style-name="Normal">Sales Summary</text:p>
      <text:p text:style-name="Normal">-------------------------</text:p>
      <text:p text:style-name="Normal">Total Sales: $73.23</text:p>
      <text:p text:style-name="Normal"/>
      <text:p text:style-name="Normal">Details:</text:p>
      <text:p text:style-name="Normal">pizza-sales.csv: $61.48</text:p>
      <text:p text:style-name="Normal">side-sales.csv: $11.75</text:p>
      <text:p text:style-name="Normal">That proves your file/directory function works.</text:p>
      <text:p text:style-name="Normal"><text:span text:style-name="T29">PizzaApi Folder</text:span></text:p>
      <text:p text:style-name="Normal">This is the Web API part of the assignment.</text:p>
      <text:soft-page-break/>
      <text:p text:style-name="Normal">Think of an API like a waiter at a restaurant.</text:p>
      <text:p text:style-name="Normal">You ask:</text:p>
      <text:p text:style-name="Normal">What pizzas do you have?</text:p>
      <text:p text:style-name="Normal">The API answers with pizza data.</text:p>
      <text:p text:style-name="Normal">Important files:</text:p>
      <text:p text:style-name="Normal">[Pizza.cs](C:/Users/olaku/OneDrive/Documents/CSE325_.NET Software Development/week01/PizzaApi/Models/Pizza.cs)</text:p>
      <text:p text:style-name="Normal">This describes what a pizza looks like in the program:</text:p>
      <text:p text:style-name="Normal">public class Pizza</text:p>
      <text:p text:style-name="Normal">{</text:p>
      <text:p text:style-name="Normal"><text:s text:c="4"/>public int Id { get; set; }</text:p>
      <text:p text:style-name="Normal"><text:s text:c="4"/>public string Name { get; set; } = string.Empty;</text:p>
      <text:p text:style-name="Normal"><text:s text:c="4"/>public bool IsGlutenFree { get; set; }</text:p>
      <text:p text:style-name="Normal">}</text:p>
      <text:p text:style-name="Normal">So every pizza has:</text:p>
      <text:p text:style-name="Normal">Id = number</text:p>
      <text:p text:style-name="Normal">Name = pizza name</text:p>
      <text:p text:style-name="Normal">IsGlutenFree = true or false</text:p>
      <text:p text:style-name="Normal">Example:</text:p>
      <text:p text:style-name="Normal">{</text:p>
      <text:p text:style-name="Normal"><text:s text:c="2"/>"id": 1,</text:p>
      <text:p text:style-name="Normal"><text:s text:c="2"/>"name": "Classic Italian",</text:p>
      <text:p text:style-name="Normal"><text:s text:c="2"/>"isGlutenFree": false</text:p>
      <text:p text:style-name="Normal">}</text:p>
      <text:p text:style-name="Normal">[PizzaController.cs](C:/Users/olaku/OneDrive/Documents/CSE325_.NET Software Development/week01/PizzaApi/Controllers/PizzaController.cs)</text:p>
      <text:p text:style-name="Normal">This is the “pizza waiter.”</text:p>
      <text:soft-page-break/>
      <text:p text:style-name="Normal">It handles requests like:</text:p>
      <text:p text:style-name="Normal">GET /api/pizza</text:p>
      <text:p text:style-name="Normal">POST /api/pizza</text:p>
      <text:p text:style-name="Normal">PUT /api/pizza/1</text:p>
      <text:p text:style-name="Normal">DELETE /api/pizza/1</text:p>
      <text:p text:style-name="Normal">Meaning:</text:p>
      <text:p text:style-name="Normal">GET = show me pizzas</text:p>
      <text:p text:style-name="Normal">POST = add a new pizza</text:p>
      <text:p text:style-name="Normal">PUT = change an existing pizza</text:p>
      <text:p text:style-name="Normal">DELETE = remove a pizza</text:p>
      <text:p text:style-name="Normal">[Program.cs](C:/Users/olaku/OneDrive/Documents/CSE325_.NET Software Development/week01/PizzaApi/Program.cs)</text:p>
      <text:p text:style-name="Normal">This starts the web app. It tells .NET:</text:p>
      <text:p text:style-name="Normal">Use controllers</text:p>
      <text:p text:style-name="Normal">Use Swagger</text:p>
      <text:p text:style-name="Normal">Map the API routes</text:p>
      <text:p text:style-name="Normal">Run the app</text:p>
      <text:p text:style-name="Normal">Swagger is a browser page that helps you test the API more easily.</text:p>
      <text:p text:style-name="Normal">[PizzaApi.http](C:/Users/olaku/OneDrive/Documents/CSE325_.NET Software Development/week01/PizzaApi/PizzaApi.http)</text:p>
      <text:p text:style-name="Normal">This is a testing helper file. It has ready-made API requests, like:</text:p>
      <text:p text:style-name="Normal">GET http://localhost:5124/api/pizza</text:p>
      <text:p text:style-name="Normal">You can use it in VS Code to test the pizza API.</text:p>
      <text:p text:style-name="Normal"><text:span text:style-name="T30">Data Folder</text:span></text:p>
      <text:p text:style-name="Normal">This folder contains the evidence/output for the sales summary part.</text:p>
      <text:p text:style-name="Normal">Data</text:p>
      <text:soft-page-break/>
      <text:p text:style-name="Normal"><text:span text:style-name="T31">├</text:span><text:span text:style-name="T32">──</text:span><text:s/>SalesFiles</text:p>
      <text:p text:style-name="Normal">│ <text:s text:c="2"/><text:span text:style-name="T33">├</text:span><text:span text:style-name="T34">──</text:span><text:s/>pizza-sales.csv</text:p>
      <text:p text:style-name="Normal">│ <text:s text:c="2"/>└── side-sales.csv</text:p>
      <text:p text:style-name="Normal">└── sales-summary.txt</text:p>
      <text:p text:style-name="Normal">SalesFiles contains the input files.</text:p>
      <text:p text:style-name="Normal">sales-summary.txt is the finished report made by your program.</text:p>
      <text:p text:style-name="Normal"><text:span text:style-name="T35">README.md</text:span></text:p>
      <text:p text:style-name="Normal">[README.md](C:/Users/olaku/OneDrive/Documents/CSE325_.NET Software Development/week01/README.md)</text:p>
      <text:p text:style-name="Normal">This is your explanation note. It tells your teacher what is inside the folder and what commands to run.</text:p>
      <text:p text:style-name="Normal">It is like a small instruction sheet.</text:p>
      <text:p text:style-name="Normal"><text:span text:style-name="T36">How To Run It</text:span></text:p>
      <text:p text:style-name="Normal">To build/check everything:</text:p>
      <text:p text:style-name="Normal">cd week01</text:p>
      <text:p text:style-name="Normal">dotnet build Week01Assignment.sln</text:p>
      <text:p text:style-name="Normal">To run the sales report program:</text:p>
      <text:p text:style-name="Normal">dotnet run --project SalesSummary</text:p>
      <text:p text:style-name="Normal">To run the pizza API:</text:p>
      <text:p text:style-name="Normal">dotnet run --project PizzaApi</text:p>
      <text:p text:style-name="Normal">Then the API will run at something like:</text:p>
      <text:p text:style-name="Normal">http://localhost:5124</text:p>
      <text:p text:style-name="Normal">And the pizza endpoint is:</text:p>
      <text:p text:style-name="Normal">http://localhost:5124/api/pizza</text:p>
      <text:p text:style-name="Normal"><text:span text:style-name="T37">Simple Summary</text:span></text:p>
      <text:p text:style-name="Normal">Your assignment is saying:</text:p>
      <text:soft-page-break/>
      <text:p text:style-name="Normal">“Make a .NET assignment folder that proves you can build a C# app and a Web API.”</text:p>
      <text:p text:style-name="Normal">Your solution has:</text:p>
      <text:p text:style-name="Normal">SalesSummary = proves you can work with files and directories</text:p>
      <text:p text:style-name="Normal">PizzaApi = proves you can build a controller API with CRUD</text:p>
      <text:p text:style-name="Normal">Data = proof/output from the sales program</text:p>
      <text:p text:style-name="Normal">README = notes for your teacher</text:p>
      <text:p text:style-name="Normal">Week01Assignment.sln = connects both projects together</text:p>
      <text:p text:style-name="Normal">So yes, this matches the assignment expectation. The main thing left is to commit it, push it to GitHub, and submit the GitHub repo link in Canvas.</text:p>
      <text:p text:style-name="Normal">README.mdDocument · MDOpen previewOpen in</text:p>
      <text:p text:style-name="Normal">11:16 AM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  <style:font-face style:name="Courier New" svg:font-family="Courier New" style:font-family-generic="modern" style:font-pitch="fixed" svg:panose-1="2 7 3 9 2 2 5 2 4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lakunle obademi</meta:initial-creator>
    <dc:creator>olakunle obademi</dc:creator>
    <meta:creation-date>2026-06-30T10:51:00Z</meta:creation-date>
    <dc:date>2026-07-01T17:48:00Z</dc:date>
    <meta:template xlink:href="Normal.dotm" xlink:type="simple"/>
    <meta:editing-cycles>1</meta:editing-cycles>
    <meta:editing-duration>PT28440S</meta:editing-duration>
    <meta:document-statistic meta:page-count="7" meta:paragraph-count="10" meta:word-count="767" meta:character-count="5135" meta:row-count="36" meta:non-whitespace-character-count="4378"/>
  </office:meta>
</office:document-meta>
</file>