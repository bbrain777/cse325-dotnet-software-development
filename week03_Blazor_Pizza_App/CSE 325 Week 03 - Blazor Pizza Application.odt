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Github<text:s/>Repo_CSE 325 Week 03<text:s/>-<text:s/>Blazor Pizza Application <text:s text:c="3"/></text:p>
      <text:p text:style-name="Normal"><text:a xlink:href="https://github.com/bbrain777/cse325-dotnet-software-development/tree/main/week03_Blazor_Pizza_App" office:target-frame-name="_top" xlink:show="replace"><text:span text:style-name="Hyperlink">https://github.com/bbrain777/cse325-dotnet-software-development/tree/main/week03_Blazor_Pizza_App</text:span></text:a></text:p>
      <text:p text:style-name="Normal"/>
      <text:p text:style-name="Normal"><draw:frame draw:style-name="a0" draw:name="Picture 1" text:anchor-type="as-char" svg:x="0in" svg:y="0in" svg:width="6.5in" svg:height="3.49375in" style:rel-width="scale" style:rel-height="scale"><draw:image xlink:href="media/image1.png" xlink:type="simple" xlink:show="embed" xlink:actuate="onLoad"/><svg:title/><svg:desc>Get Pizza List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akunle obademi</meta:initial-creator>
    <dc:creator>olakunle obademi</dc:creator>
    <meta:creation-date>2026-07-14T10:19:00Z</meta:creation-date>
    <dc:date>2026-07-14T10:23:00Z</dc:date>
    <meta:template xlink:href="Normal.dotm" xlink:type="simple"/>
    <meta:editing-cycles>1</meta:editing-cycles>
    <meta:editing-duration>PT240S</meta:editing-duration>
    <meta:document-statistic meta:page-count="1" meta:paragraph-count="1" meta:word-count="40" meta:character-count="272" meta:row-count="1" meta:non-whitespace-character-count="233"/>
  </office:meta>
</office:document-meta>
</file>