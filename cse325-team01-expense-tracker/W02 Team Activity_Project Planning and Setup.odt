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roman" svg:panose-1="0 0 0 0 0 0 0 0 0 0"/>
    <style:font-face style:name="Times New Roman" svg:font-family="Times New Roman" style:font-family-generic="roman" style:font-pitch="variable" svg:panose-1="2 2 6 3 5 4 5 2 3 4"/>
    <style:font-face style:name="Aptos Display" svg:font-family="Aptos Display" style:font-family-generic="roman" svg:panose-1="0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list-style-name="LFO2" style:family="paragraph"/>
    <style:style style:family="graphic" style:name="a0" style:parent-style-name="Graphics">
      <style:graphic-properties fo:border="none" fo:background-color="transparent"/>
    </style:style>
  </office:automatic-styles>
  <office:body>
    <office:text text:use-soft-page-breaks="true">
      <text:p text:style-name="P1">Our Team 1 Week 2 meeting focused on project planning and setup for the CSE 325 group project.</text:p>
      <text:p text:style-name="Normal">We met in Microsoft Teams in the CSE 325 Team 01 channel. During the meeting, we discussed ideas for the group .NET project, shared GitHub usernames, confirmed our Trello board, confirmed the group GitHub repository, and selected Expense Tracker as the project idea to move forward with.</text:p>
      <text:p text:style-name="Normal">Participants:<text:line-break/>- Benjamin Asante<text:line-break/>- John Mark Bacod Manuel<text:line-break/>- Raphael Daveal<text:line-break/>- Olakunle Obademi<text:line-break/>- Ka Kan Ho</text:p>
      <text:p text:style-name="Normal">Group repository URL:<text:line-break/>https://github.com/Daveralphy/cse325-team01-expense-tracker</text:p>
      <text:p text:style-name="Normal">Trello board:<text:line-break/>https://trello.com/b/Hso1t6XM</text:p>
      <text:p text:style-name="Normal">Local clone:<text:line-break/>I cloned the group repository to my local computer in the folder:<text:line-break/>cse325-team01-expense-tracker</text:p>
      <text:p text:style-name="Normal">Project ideas considered:</text:p>
      <text:p text:style-name="Normal">1. Expense Tracker<text:line-break/>Target audience: students, families, and small business owners.<text:line-break/>Features: user login, expense CRUD, categories, monthly budgets, filtering, dashboard totals, and reports.<text:line-break/>Status: selected as the team project.</text:p>
      <text:p text:style-name="Normal">2. Task Manager App<text:line-break/>Target audience: students or workers.<text:line-break/>Features: create tasks, set due dates, track status, and organize by priority.</text:p>
      <text:p text:style-name="Normal">3. Study Planner<text:line-break/>Target audience: students.<text:line-break/>Features: manage courses, study sessions, assignments, due dates, and study goals.</text:p>
      <text:soft-page-break/>
      <text:p text:style-name="Normal">4. Book Review App<text:line-break/>Target audience: readers.<text:line-break/>Features: track books, add ratings/reviews, organize by genre, and search/filter books.</text:p>
      <text:p text:style-name="Normal">5. BYUI Group Study App<text:line-break/>Target audience: BYU-Idaho students.<text:line-break/>Features: create study groups, join sessions, and view meeting times and subjects.</text:p>
      <text:p text:style-name="Normal"/>
      <text:list text:style-name="LFO2" text:continue-numbering="true">
        <text:list-item>
          <text:p text:style-name="P2">A screenshot of your local repo clone.</text:p>
        </text:list-item>
      </text:list>
      <text:p text:style-name="Normal"><draw:frame draw:style-name="a0" draw:name="Picture 1" text:anchor-type="as-char" svg:x="0in" svg:y="0in" svg:width="6.5in" svg:height="3.49375in" style:rel-width="scale" style:rel-height="scale"><draw:image xlink:href="media/image1.png" xlink:type="simple" xlink:show="embed" xlink:actuate="onLoad"/><svg:title/><svg:desc>The image displays a software interface with a file listing for 'cse325-team01-expense-tracker', including team member names, and a section for project details.

AI-generated content may be incorrect.</svg:desc></draw:fram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roman" svg:panose-1="0 0 0 0 0 0 0 0 0 0"/>
    <style:font-face style:name="Times New Roman" svg:font-family="Times New Roman" style:font-family-generic="roman" style:font-pitch="variable" svg:panose-1="2 2 6 3 5 4 5 2 3 4"/>
    <style:font-face style:name="Aptos Display" svg:font-family="Aptos Display" style:font-family-generic="roman" svg:panose-1="0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olakunle obademi</meta:initial-creator>
    <dc:creator>olakunle obademi</dc:creator>
    <meta:creation-date>2026-07-08T15:16:00Z</meta:creation-date>
    <dc:date>2026-07-08T15:28:00Z</dc:date>
    <meta:template xlink:href="Normal.dotm" xlink:type="simple"/>
    <meta:editing-cycles>1</meta:editing-cycles>
    <meta:editing-duration>PT540S</meta:editing-duration>
    <meta:document-statistic meta:page-count="2" meta:paragraph-count="3" meta:word-count="232" meta:character-count="1558" meta:row-count="11" meta:non-whitespace-character-count="1329"/>
  </office:meta>
</office:document-meta>
</file>