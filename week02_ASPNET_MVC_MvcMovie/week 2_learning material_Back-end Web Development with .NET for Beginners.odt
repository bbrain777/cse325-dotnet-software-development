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roman" svg:panose-1="0 0 0 0 0 0 0 0 0 0"/>
    <style:font-face style:name="Times New Roman" svg:font-family="Times New Roman" style:font-family-generic="roman" style:font-pitch="variable" svg:panose-1="2 2 6 3 5 4 5 2 3 4"/>
    <style:font-face style:name="Aptos Display" svg:font-family="Aptos Display" style:font-family-generic="roman" svg:panose-1="0 0 0 0 0 0 0 0 0 0"/>
  </office:font-face-decls>
  <office:automatic-styles>
    <style:style style:name="P1" style:parent-style-name="Normal" style:master-page-name="MP0" style:family="paragraph">
      <style:paragraph-properties fo:break-before="page"/>
    </style:style>
    <style:style style:name="T2" style:parent-style-name="DefaultParagraphFont" style:family="text">
      <style:text-properties fo:language="en" fo:country="US"/>
    </style:style>
    <style:style style:name="T3" style:parent-style-name="DefaultParagraphFont" style:family="text">
      <style:text-properties fo:language="en" fo:country="US"/>
    </style:style>
    <style:style style:name="P4" style:parent-style-name="Normal" style:family="paragraph">
      <style:text-properties fo:language="en" fo:country="US"/>
    </style:style>
    <style:style style:name="P5" style:parent-style-name="Normal" style:family="paragraph">
      <style:text-properties fo:language="en" fo:country="US"/>
    </style:style>
    <style:style style:name="P6" style:parent-style-name="Normal" style:family="paragraph">
      <style:text-properties fo:language="en" fo:country="US"/>
    </style:style>
    <style:style style:name="P7" style:parent-style-name="Normal" style:family="paragraph">
      <style:text-properties fo:language="en" fo:country="US"/>
    </style:style>
    <style:style style:name="P8" style:parent-style-name="Normal" style:family="paragraph">
      <style:text-properties fo:language="en" fo:country="US"/>
    </style:style>
    <style:style style:name="P9" style:parent-style-name="Normal" style:family="paragraph">
      <style:text-properties fo:language="en" fo:country="US"/>
    </style:style>
    <style:style style:name="P10" style:parent-style-name="Normal" style:family="paragraph">
      <style:text-properties fo:language="en" fo:country="US"/>
    </style:style>
    <style:style style:name="P11" style:parent-style-name="Normal" style:family="paragraph">
      <style:text-properties fo:language="en" fo:country="US"/>
    </style:style>
    <style:style style:name="T12" style:parent-style-name="Hyperlink" style:family="text">
      <style:text-properties fo:language="en" fo:country="US"/>
    </style:style>
    <style:style style:name="T13" style:parent-style-name="DefaultParagraphFont" style:family="text">
      <style:text-properties fo:language="en" fo:country="US"/>
    </style:style>
    <style:style style:name="T14" style:parent-style-name="Hyperlink" style:family="text">
      <style:text-properties fo:language="en" fo:country="US"/>
    </style:style>
    <style:style style:name="T15" style:parent-style-name="DefaultParagraphFont" style:family="text">
      <style:text-properties fo:language="en" fo:country="US"/>
    </style:style>
    <style:style style:name="T16" style:parent-style-name="Hyperlink" style:family="text">
      <style:text-properties fo:language="en" fo:country="US"/>
    </style:style>
    <style:style style:name="T17" style:parent-style-name="DefaultParagraphFont" style:family="text">
      <style:text-properties fo:language="en" fo:country="US"/>
    </style:style>
    <style:style style:name="T18" style:parent-style-name="Hyperlink" style:family="text">
      <style:text-properties fo:language="en" fo:country="US"/>
    </style:style>
    <style:style style:name="T19" style:parent-style-name="DefaultParagraphFont" style:family="text">
      <style:text-properties fo:language="en" fo:country="US"/>
    </style:style>
    <style:style style:name="T20" style:parent-style-name="Hyperlink" style:family="text">
      <style:text-properties fo:language="en" fo:country="US"/>
    </style:style>
    <style:style style:name="T21" style:parent-style-name="DefaultParagraphFont" style:family="text">
      <style:text-properties fo:language="en" fo:country="US"/>
    </style:style>
    <style:style style:name="T22" style:parent-style-name="Hyperlink" style:family="text">
      <style:text-properties fo:language="en" fo:country="US"/>
    </style:style>
    <style:style style:name="T23" style:parent-style-name="DefaultParagraphFont" style:family="text">
      <style:text-properties fo:language="en" fo:country="US"/>
    </style:style>
    <style:style style:name="P24" style:parent-style-name="Normal" style:family="paragraph">
      <style:text-properties fo:language="en" fo:country="US"/>
    </style:style>
    <style:style style:name="P25" style:parent-style-name="Normal" style:family="paragraph">
      <style:text-properties fo:language="en" fo:country="US"/>
    </style:style>
    <style:style style:name="P26" style:parent-style-name="Normal" style:family="paragraph">
      <style:text-properties fo:language="en" fo:country="US"/>
    </style:style>
    <style:style style:name="P27" style:parent-style-name="Normal" style:family="paragraph">
      <style:text-properties fo:language="en" fo:country="US"/>
    </style:style>
  </office:automatic-styles>
  <office:body>
    <office:text text:use-soft-page-breaks="true">
      <text:p text:style-name="P1"><text:span text:style-name="T2">Yeah, hello. APIs ASP, NET Core Before we get started, let's define a few terms first. What are Web APIs? Well, before we can talk about Web APIs, we have to talk about APIs. APIs are application program interfaces, and it's a way for applications to communicate with each other. Web APIs are simply APIs that communicate with each other over the Internet. They typically implement a request response pattern. That is 1 application, which is usually a client. Like your web browser will send a request to another application, which is usually a server, and that server will respond to the request with the response. Because these clients communicate with each other, it's important that. There is a standardized format that they can agree upon for understanding each other's messages. Jason and XML are formats that you might be familiar with for describing how data is communicated between clients and servers in a Web API. We'll cover all of these concepts in future videos in the series, but first we want to get familiar. With ASP Net Core. ASP Net Core is the technology that we'll be using in this beginner series. ASP Net Core is net open source, fast performance and cross-platform application for building web APIs. Now because it's cross-platform, it can run on Windows, Linux, Mac OS. You can even run it on a Docker container. It's pretty neat. I'm an ASP net Core has built in support for building web APIs. We'll explore all of the features that are included in ASP Net Core building web APIs in this series so far, we've defined terms like web APIs and developed an understanding of ASP net Core which is Nets cross. Forman high performance platform for building with. Of APIs. In the next video in this series, we're going to start looking at some code and build our first web apiusing.net. In the last videoofthis.net beginner series, we defined web APIs and talked about ASP Net Core. In this video we're going to get our hands dirty. With ASP Net Core and write some code. In particular, we're going to gain an understanding of ASP Net Core hosting model. To get started, I'm going to head over to my VS Code instance and createanew.net project using the C Devkit extension. Let's go ahead and select Net New project. We'll select ASP NET Core Empty, which is the empty web template. And we'll select a target folder for our new project. I'm going to put it in my source directory here and give our new project a name. Let's go ahead and call it my new app. You can call yours whatever you'd like. Awesome. Once you've created our new template, we're going to head over to the program CS file that was created for our project. In this file, ASP NET Core apps are configured. It will launch a host that's responsible for starting the application, configuring an underlying HTTP server, and setting up the pipeline for processing. Requests and responses over HTTP, a protocol of the Internet. In sum, it'll set up everything we need to start writing our Web API. In this minimal hosting model, the web application builder we construct on line 1 provides us with API's for configuring the application host. We'll experiment with some of these APIs in future videos in this series, but for now we can take a look at some of the properties available on this type by typing builder dot and. You'll see that we have access to the host, the environment, details about its configuration, and other attributes that we can enhance. There's lots of ways that you can customize your ASP NET Core application, but for now it's important to know<text:s/></text:span><text:soft-page-break/><text:span text:style-name="T3">that it's possible once we've configured our host by writing code in between lines one and three in this file. We can build our web application. The web application, which is defined here, configures the request response pipeline behind the scene. It allows users to configure route handlers in their application and exposes a run method that we can call to start our HTTP server and initiate our HTTP request processing pipeline in this video. we took a look at the code that's generated and create a new ASP net core web template in VS code and we learned a little bit about the hosting model that's responsible for running our ASP net core applications in the next video in this series we're going to start first with our first web API using ASP net cores minimal apis.</text:span> </text:p>
      <text:p text:style-name="P4">ASP, Net Core and in the last video we started taking a look at some code and talked about the minimal hosting model. In this video, we're going to bridge the two concepts together and talk about minimal APIs. We talked about how web APIs follow a request response pattern. A client sends a request to a server. The server is responsible for processing that request and sending back a response. In ASP NET Core Minimal APIs allow us to describe how requests should be processed by a server using an entity known as an endpoint. Minimal APIs provides succinct methods for registering new endpoints. Handle incoming requests in our Web API. If we take a look at the code, we'll observe the three components that are important for defining how a web request should be handled online 5. Those three elements are the HTTP method, the URL route, and the actual handler that is meant to execute when an incoming request is processed that matches the method and the route if we take a look at line 5. We'll observe that I'm calling the map GET method. GET is an HTTP method. Or verb that indicates that a client is requesting or wanting to get information from a server. The second argument that I care about here is the route pattern. This tells me that whenever a client sends a GET request to the/ route in my application, then I should execute the logic that is implemented in my handler. Here if we take a look at this. We can run our application. We can try this out by running our application using the C# Devkit extension. I'm going to head over. Refer to the top right of my screen and hit run. My application will build and then launch. Here I can observe that I've got a web server that's running and listening on port 5144 for requests coming from any clients. OK, so my server is running, but where is my client? I could use a web browser to send a request to localhost. 45144 and see my applications response, but I want to try and show you something new here. Instead. I'm going to use VS Code support for sending Http://requests via HTTP files so that I can send requests straight from my editor. So to do that I'm going to create a new file. I'm going to call it my requests. Dot HTTP. Now I have the ability to send requests to my running HTTP server via this file. All I have to do is indicate the name of the HTTP method that I would like to use. In our case it's GET. And then provide it with a route which consists of a URL and a path that I want to send my request to. So for us it's going to be Http://localhost. That port number 5144. And it'll be/ for our path. Great, we can go ahead and select the send request. And we'll see that we<text:s/><text:soft-page-break/>received a response back from the server with Hello World, which is the string that we expected it to print. So that's it. We've built our first Web API. It's not quite. There's a little bit more to do here to really show you the power of web APIs. I want to show you what it's like to build an API that follows the. pattern for application development crowd is an acronym that stands for create read update delete it drives the ways that users can interact with objects in your application Done Web API development before? You might be familiar with this classic TODO example, so let's get right into it. I'm going to stop my running application, close out these windows and head back to my program CS file. I'm going to go ahead and delete this map get call so that we have a clean playground. To write our new API. Now I mentioned that our new API is going to be interacting with todo items in an application. To get started with this, I'm going to implement the type that allows me to represent the todos in my application and I'm going to do this using a record. If you've watched our Beginner C# series, you might be familiar with records as a strategy for defining types. In our application. Here, I've used it to define A to Do type that consists of an ID, a name, a due date, and an is completed status indicator. So we've got our to do, but in our API we went to manage more than. Just a single to do. We want to maintain a list of them, so I'm going to do that by declaring A to do list variable here, which will capture the Todo's running in our application. Now it's important to note here that this To Do List is being stored in memory. I'm not saving it to an external database or anything like that. So as soon as I stopped my running application server, those todos that I've created are wiped out. In a typical application, you'll be instantiating a database to store this data, so that's persisted outside the lifetime of your application server. But to get started, this is fine for now. Great, so we've got a way of representing todos. In your application and a way of maintaining a list of todos in memory. I need to start providing APIs so that users can actually create great update and delete those Todos CRUD. And to do that, I'm going to use that same map HTTP method invocation file that we saw with our Hello world method. So let's go ahead and implement our first one. We'll implement a method for creating. YouTube in our application. How does this work? What I've done is I've invoked the map POST method similar to the map GET method. This indicates that I'm trying to register a handler that will react to requests coming into my application via the POST HTTP method, and in particular I care about requests that are being sent. To the to do's path that is running on my notification. So whenever a client sends a POST request dues URL in my application, the logic that I've written here is going to run. And what does that logic? Well, it's implemented in this inline function. It says go ahead and take whatever task has been provided for me and add it to the list. Maintaining by maintaining and the current return as strongly as once that says hunts that says I've created ask, ask. There are just 3-4 lines of code here, but there's a lot going on under the hood. Let's break it down. First things first things first, we have this todo parameter that we're defining as the input to our handler function. What's going on behind the scenes is that minimal APIs will take a look at this parameter. Understands that it represents a complex type like A to do and try and process that<text:s/><text:soft-page-break/>from the body of the request that is set. Minimal APIs will take care of understanding that request body and deserializing it to a type that you can interact with in your application code, so that's how the inputs are handled. What about? The outputs the response that we send. Http://consists of a wide array of status codes that can be represented in the HTTP response. These status codes are numerical data indicate indicate the status or behavior of the response that was returned. In this particular case, we can see that status code 201 is used to represent a response. Which says that was created, created. You might be familiar with other status codes like 404 that something was something wasn't found, or 500 which says that there was some sort of internal server error, or maybe 401 which says hey, you're not authorized to view this particular consequences. Consequences give us tons of meaning. What happened and what happened and what was executed lets us know, lets us know, lets us know. Resulted in the resulted in the object, object, object. Great. So that's our policy. Now the great thing about minimal 8 we can use that we can use the same structure points in our minds and our app points in our application. I've covered being covered being able to create, but we but we solved, but we still have to think about reading minimum minimum. Go ahead. I'm going to go ahead and create a new to do, to do to do from my list of todos baby. Go ahead. Let's go ahead and take a look at what the code for that quick. All right, there's a lot of code here and there's some squiggles, but we're going to dig into. First things first, we have the stuff that we're familiar with. The GET here indicates wanting to accounting to a GET request. Are we a URL? URL? There's, but there's something on here on here. There's this idea that appears better that appears to be enclosed in curly braces. And in fact, these curly braces have meaning. They indicate that we're not just looking string string ID, we're looking for some sort of parameter that is going to be sent as part of the URL. In this case, that parameter is going to be an integer that represents the ID of the TODO that we want to resolve. Route parameters are a powerful concept. That allow you to change. Behavior of your route handler based on information that you're getting from your client. In this particular case, our route handler is going to return different information depending on the ID's that it gets in the input. We can see that here that we searched through our todos list trying to find the to do that matches the. Client reported, client reported client request. If we don't find one, we're going to return a not found response. That's that 404 response that we discussed earlier. And if we do find them to do that matches her by the user, by the user, by the user, we're going to 200 OK, 200 OK, 200 OK. That makes code. That makes code. You'll notice this, you'll notice wiggles all wiggles, all wiggles, all wiggles, all wiggles because that is because that is because that is type type, type. Thanks, thanks. Thanks. Thanks. It can either return an OK response, which we'll continue new spots spots for 4/04 4:04. 404 Object object namespace namespace names until until until until space. I'm gonna go face. I'm gonna bridge, bridge, bridge, bridge, bridge, bridge here here here. Here, here, here, here, here, here, here comes the response to the response to the respondent from based on information on inform, based on income, based on income, based on that and retrieve<text:s/><text:soft-page-break/>that and retrieve that and retrieve that and type fonts, type fonts type. and this and this and this and this and this and this be plex web plex web app plex what time most of the time most of the time stuff the time So that's our map get that helps us resolve to Jews by their ID. Now it might be helpful just to get a list of all of the kiddos in an application. So we're going to go ahead and add another endpoint to do just that and get all Todos. All right, we're back to simpler. This is this is just Rode line of code. That says whenever a user sends a GET request to our To Do's route, we're going to return the todos list. What's really neat here is that I'm not using a strongly typed result at all and I'm just returning my todos list object directly, and that's because minimal APIs understands. How to interpret the return type of the function that you've provided and serialize it correctly in the response? In this case, it knows that to do is a list that needs to be serialized and represented as a list of things when it is sent to the client. So far we've covered how to create route handlers to create new todos. And to retrieve all of the stews in our list, or just a single one. There's one more endpoint that I want to add, which is one that supports deleting Todos. I'll go ahead and implement that right here. We can see that it builds on some of the principles that we learned about in earlier endpoints. We've got this ID. About parameter that will resolve and represents the idea of the todo item that we want to delete. We've got this type results object that we're returning. In this case it's no content which is an item which is the response with the status code 204 representing that there's no content to return to items are to do item. great great so we've implemented all of the endpoints that are related to our application in the next video in this series we're going to take a look at testing our application and making sure that the endpoints behaves the way we expects. </text:p>
      <text:p text:style-name="P5">A Web API with minimal APIs. In this video we're going to take a look at testing our Web API using HTTP files. I'm going to head over to the HTTP file that I created earlier to test out our Mt Hello World template and use it to send out requests to a running API. Now the first thing I want to do is verify. Everything in my application server just works, and to do that I'm going to send a GET request to the todos endpoint in my application. This should send me back an empty list. It's because I haven't done anything to create new items in my To Do List by sending a POST request to my API. Let's confirm this by running our application. Ohh, now their application is running. We'll go ahead and send this request. Go ahead and update our port here. Hit send request. OK, I've gotten a response back. There's some things here that I expect to see 200 OK everything went well and it's an empty list because I haven't created any items. In my To Do List yet, so let's do that next. X and verify that our handler for processing POST requests to the to do's endpoint works correctly. So we'll go ahead. And call back up. So there's a couple of things that are going on here. I'm sending a POST request to that Todos endpoint. Remember earlier when we talked about standardized format asked that clients and servers can communicate, used to communicate with each other? Well, here's our first indication of that. In line 6, I'm defining the content type of the request. The content type is a way that my client can<text:s/><text:soft-page-break/>communicate to the server what data format is used when representing the payload in the body of the response. Here I'm saying it's going to be a JSON based payload and I'm sending that exact payload using JSON which uses these keys and values to represent the properties of my. Talked about them earlier when we defined our to do type, we've got ID, name, due date and is completed. The properties in this JSON object will map to the properties in my to do type when I send this request. So let's go ahead and do that send request. OK, things are looking good. I can see that I received. A 201 created response and the payload consists of the exact same information that I sent, which is the properties related to that particular to do. Now if I go ahead and send request again to the get todos, I will receive a list of all the todos which should hopefully include. The one that I just created. Yep. And there it is. You'll notice it was a little bit of a subtle change. My to do's been now been enclosed in these brackets, which represent the list of all the news. Just to confirm the behavior here, let's go ahead and add another to do. We'll give this one ID 2. We'll say write another demo. And we'll send the request over. There we go. We got our response. It's a different to do. It's got a different ID. And if we retrieve the list of items again, we'll see that we've got to do with ID one and A to do with ID ID 2. Great. So it looks like our post and get all to do. The points are working. Let's try a few more end points just to make sure that everything's working correctly. Now, one of the other things that we added was a handler that allowed us to resolve items by their ID. So let's go ahead and test it out and see if we can resolve the seconds to do that, we added by sending again. Request to it. So I've copied over the same request that I used earlier, but key distinguishing factor. I'm going to go ahead and add/ 2 where 2 is going to be that route parameter that gets mapped to the ID that we use to find to do with the ID #2 in our list if we send a request. Here, what I expect to see is a single item returned, not a list. And I expect it to be the item with to do or, and I expect it to be the item with ID 2. There you go, that is exactly what we expect. We've got 200 status code and we've got the payload that we want to see. The last thing we want to try. How is our DELETE? We added some logic to be able to delete to use my ID and we'll go ahead and send a request to that. Now we'll just go ahead and copy our GET by ID, go ahead and just replace GET with DELETE. And send that request. Cool. OK, so I see the response that I expect to see 204 no content. It looks like it deleted it successfully. To double check this though, I'm going to send a request to my get all todos route. And what I expect to see is a single element in my list. And there it is. There's just one to do with ID, one which is not the one that we deleted earlier in this video of this series, we validated the implementation of the Web API that we built for managing items in A to do list. In the next video in this series, we'll start taking a look at some of the. other features in ASP net core that make building web apis a super robust experience. </text:p>
      <text:p text:style-name="P6">In the third video of the series, we talked about how bright route handlers help us define behaviors that should run when an HTTP request has a particular shape, for example, a certain<text:s/><text:soft-page-break/>HTTP method or being directed to a certain route. But. What if we want some logic that runs on every HTTP request that is sent to our server? That is where middlewares come in. Middlewares are a piece of code that can run before and after each request is processed and they run on all requests in a nested order. There are super powerful way for us to. Execute common functionality on each request, for example logging some information whenever a request is received or response is processed. ASP NET Core comes with a collection of middlewares built in. As a matter of fact, that logic that we talked about that understands how to direct. Your requests with a given shape to the appropriate handlers is actually implemented as a middleware called the Endpoint Routing Middleware. There's all sorts of other middlewares that come built in with ASP NET Core. For example, there's ones that help you host static files on your application server. In addition to the built in middlewares that come with ASP NET Core, you can write your own middlewares which unlocks a whole world of possibilities because anything that you want to write as common functionality in your application can be implemented using these middleware API's. We're going to play around with these APIs. In two ways, We're going to use a built-in middleware to support rewriting URLs that are sent in the request to our HTTP server, and then we're going to define our own middleware to do some simple logging whenever requests are received and responses are processed. Let's go back to the code that we were taking a look at earlier. We'll see that we have this web application object which I mentioned earlier represents our application pipeline. It conveniently provides us with methods that we can use to register middlewares that can participate in this application pipeline. I mentioned earlier that middlewares run in nested order and that's because. Execute as part of this pipeline. So the first built in middleware that I wanna take advantage of is the URL rewrite middleware and I'll take a look at the URL that is present incoming requests, compare it with a string that I will provide, and then rewrite it to a different string if it matches the given pattern. It's a great way of redirecting requests from one round to another without having to actually define handlers to support both routes. For my particular scenario, my API responds to the requests that are sent to requests on the todos path. I want to add some functionality though, so that if somebody tries to send a request to. The tasks path to retrieve A to Do by their ID. They'll get redirected to the To Do's path. Let's do that. I'm going to go ahead and use the URL rewriter model there. Let's go ahead and invoke it. One of the things that you'll see is we're taking advantage of the used rewriter method on our web application. Earlier we discussed about the fact that the web application object represents the application pipeline. Middlewares are entities that participate in the application pipeline. They are usually registered with the use. Keyword which indicates that I want to register a middle result in the pipeline. I wanted to participate in the flow of things that are executed whenever a request please anyone. In addition to the method that is actually used to register the middleware, which is called use Rewriter for micro rewriter middleware, there's also going to be options that modify. Most middlewares and engineering delivering some sort of options for modifying their<text:s/><text:soft-page-break/>behavior. Here are rewrite options. Says that whenever I get your request that is set to 12 with some sort of property or information after it, I want to redirect it to to DOS and capture whatever arguments were sent. Following that task/ prefix. Now what this effectively does is it says if anybody sends a request to pass/ 1 or tasks/ 2 there are going to be redirected to to do/ 1 to do is/ 2 to leave. Thing here is that the URL. Right or middle? Capturing important information and relaying it in the rewrite. So let's go ahead and test this in the same way that we've tested things in the fourth video of this series. We're going to run our application and we're going to head over to our file. We are going to send a request. This time though, instead of being sent to the todos routes, we're going to send it to the tasks route. These people go ahead and Http://localhost code number. You also have. Now we can send the request, but as you'll recall from the third video in this series, the list of todo items that are stored in our application is stored in memory, and every time I stop my server, that list is cleared away. So our list is presently empty. What I want to do is populate it with new items. I'm going to scroll back to the request that I used earlier. Change this back to ID 1. Stories here, and we'll issue a POST request to the To Do's endpoint. Again, I'll send that request over and we'll see that we get 201 created. OK, great, now we can head over to the request for tasks. Send that. And we get what we expect. We have our to do return to us. And that is because behind the scenes the URL rewriter middleware executed when a request came in, it examined the request, replaced the URL that was encompassed in that request to one that contained the string to DOS instead of tasks. And then later when our routing middleware attempted to map our request to the appropriate handler, it saw the string todos one and used it to map to the appropriate handler. Which means that we get the expected behavior, which is 200 OK because we were redirected to the appropriate handler, not 404 not found. Because the tasks route did not exist as a supportive handler in our application. So that's pretty neat. We're able to use built-in middleware to have some cool functionality to our application, but I want to get a little bit creative and actually write my own middleware. We'll do that next stop. For running application and head back to our code and talk a little bit about what it means to write custom middleware in ASP NET core. Now the middleware I want to write is going to be aware to support logging for our applications. I want to log some information as requests are coming in and coming out. They're robust solutions for logging and actual ASP NET Core applications, but this will just showcase how we can write our own custom middleware. So let's go ahead and write out our custom middleware. We'll observe a couple of things from the code here. The first is that we're using that use verb to indicate that we want to register. Middleware into our application pipeline. The argument that's provided to this used method is an inline function that takes 2 parameters. One of them is the Http://context and the other is the request delegate. What do these mean? Well, Simply put, the Http://context. Is a type in ASP Net Core that represents the current HTTP request and response that is being processed. When we try to understand the HTTP method URL and request body that are associated with an incoming request, those are<text:s/><text:soft-page-break/>available to us in the Http://context similarly. With her response has been written in response to that request. Those will be available in PHP context. What does that second parameter next mean? Well, middlewares run in a pipeline. After the first middleware in the pipeline runs, it's meant to invoke the next middleware in the pipeline as part of its. Functionality. It's basically a way of saying I run my logic, now you run. This is what results in the nested invocation pattern of middlewares. My middleware here has a rather simple implementation that makes use of the properties that are available on the Http://context and calls the next method. In order to invoke other middlewares in the pipeline. So what I'm doing is I am logging the method that asset is associated with my request, the path that is associated with my request, the current time when my request was received, the message that says started, then I called the next middleware in my pipeline. By using the next parameter that was provided as an input. On the outbound, after all of those middlewares have run, I'm going to come back into my context or my middleware and I print out the same information, the method, the path, the time and indicate that it's finished. So there you have it. One thing that is important to note is that because these execute an order. My middleware will run after the rewrite our middleware. One thing to note is that because middlewares run in this ordered and nested fashion, my custom middleware will run after the URL rewriter middleware and we'll see how that behavior manifests when we try our application. We're going to go ahead and run it again. And we're going to head back to our HTTP file and send a request. We'll get started with this POST request to create a new, right? We see, right, We see that we get the 201 created response back. And I want to draw your attention to some information that was printed in the console. Right here we can see that we have the HTTP method. The path that was associated with their application and the current time including the string started which we expect to see and then on the outbound we can see the HTTP method, the path time and when the request finished processing. Cool, so our custom middleware is running in the pipeline. As we expect, one thing I want to showcase is we can head over to this GET request on the Tasks route by ID. Go ahead and send it and we'll see something interesting. Remember how I mentioned that because my custom middleware was registered after the URL Rewrite middleware, it'll run after it. We can see the effects of that. Here notice how the path associated with my request is/ todos/ 1. This is the path or the URL that is resulting after the URL rewriter middleware executed if my custom middleware was registered before my URL rewriter. Now where the path that I would see here would be/ tasks/ 1 because my middleware ran before the URL rewriter had the chance to modify the path in the HTTP request. So this is an example of how middleware ordering Synaptics syn applications. Pretty neat. We were able to use a built-in middleware and a custom middleware to enhance the functionality of our application. We want to highlight here that middlewares run on every request. It doesn't matter whether it's a GET request to a particular path, your middleware, we're always trying to implement the logic to, you know. Most of the given that they give interim middle weight your middle support that support so so that's pretty neat. I didn't buy the knife by the nice API for all<text:s/><text:soft-page-break/>work on all work on all work on all around. Looking for a video and this video and this video in this series, concepts, concepts, concepts, common functionality and talks. </text:p>
      <text:p text:style-name="P7">In the last video of this series, we talked about how middlewares and ASP net core can be used to write common functionality that will execute on every request that is sent to our application. But what if we want to execute common functionality on? Every request that is set to a given endpoint in our application, that is where endpoint filters come in. Endpoint filters follow some of the same concepts that middlewares do, and we'll see that as we implement our first endpoint filter. What are endpoint filters commonly used for? Well, unlike middleware. Endpoint filters have unique context on the endpoint associated with our request. That means they can understand things like what arguments our endpoint is processing. For example, an endpoint filter that we would register on our map post endpoint. Here to the to do's route, we'll understand that one of the arguments that we process is an object of the to do type, and it will allow us to analyze that object and understand it. It'll also allow us to examine anything that is returned from our handler, like this typed result for a created response. One of the things that I want to leverage and point filters for, and is indeed a very common scenario that filters are used for, is input validation. We can't always trust the information that clients send to us in their requests. Sometimes it's invalid or spelled incorrectly and we want to do our due diligence. And validating it before we process the request. Endpoint filters are perfect for this because they run after the endpoint routing middleware has executed, meaning we already know there's a handler that can process our request, but the execute before the actual handler logic, which is this user code that we've written online. It's. 26 and 27 for example has had the chance to execute. So what I want to do is add some validation of the inputs that are sent to my post todos endpoint and I'm going to do that by calling the add endpoint filter extension method on my application. I can chain this directly off my map post call. In fact, I can chain multiple endpoint filters on the same route handler. I'm not limited to just one. And in the same way that middlewares are invoked in order in a nested pattern and point filters are invoked in order in a nested pattern. That's not the only commonality with middleware that endpoint filter share. If we take a look at the parameters that I am providing to my endpoint filter handler here, I can see that I have a context object. Interesting. We saw that in the last video series on middleware and we have a next now these inputs. Have the same meaning they do in the world of middlewares. The context provides us information about the current endpoint that is being invoked, the arguments that were processed that are going to be inputs to that handler, and the Http://context associated with that request. And next is the next endpoint. Filter in the chain that we need to call. So same dynamics of the middleware that we saw earlier. In the body of my endpoint filter I can see that I am executing some code to retrieve the to do argument. I'm able to call the get argument function on the context indicate that I want it to return a. Could you type and provide a numerical value zero<text:s/><text:soft-page-break/>that indicates the 0 based index in which my argument appears in the list? For my to do handler, I've only got 1 argument. It's that to do argument, so I'm going to process that on the zero index. In line 31, I'm instantiating a new dictionary that I will use to capture errors that I discover during the validation of the inputs to my handler. The keys for this dictionaries are strings which represent the property that I'm validating. Properties here are going to be the name of my to do the ID of my. To do the due date etcetera. The value of the items in the dictionary is a list of strings that represents the errors that were encountered when processing the invalid argument. Here I can see that I'm executing two types of validations. The first thing I'm doing is I'm checking if the due date that is associated with the request is a due date in the past and I'm returning an error back that says hey you can't have it to do item or create a new to do item that's due in the past. The second validation constraints I'm adding. Is I'm checking to see if the input that the user gave me is associated with HDU item that's already been completed. In which case I'll say hey you can't add a completed to do. We only support inserting new uncompleted todos once I have analyzed my input for any errors and added them to the errors dictionary. I'm going to return a validation problem results. In the third video in this series we took a look at responses of various status codes 200 OK, 404 Not found validation problem is another format for strongly typed result it. Contains the 400 status code which is associated with a bad request and it's a way of representing issues that were encountered when validating an input type. This is formatted according to the problem detailed specification. It's a specification that outlines how all web APIs. Theoneswrittenin.net and otherwise should return validation errors to their users. This is another way that.net is a really fantastic platform to build APIs on. It helps you write code that is standards compliant. You know, really quick and succinct way a single line of code to say hey, we've got a validation problem. Your request and here's all of the errors that are associated with it. Now there's no errors that were discovered in the validation of my inputs, I'm going to go ahead and execute the next filter in the pipeline. If there's only one filter registered in my app endpoints pipeline, that next filter is going to be the actual handler associated with my application. So what is the behavior that we are going to produce here with the code that we've written? Well, you know, we get an incoming request to our application after it's run through our middlewares and after it's run through endpoint routing, it's going to hit this filter. We're going to examine the input that's been bound, which is that to do argument. That's been resolved from the request body. We're going to examine it, and if the due date or the is complete status are invalid, we will not call the handler associated with our request. Instead, we're going to return our response containing a 401 status code and a body that is compliant with the problem details format that indicates. The request failed and there's no validation issues. Without request, we're going to go ahead and call the next filter in our pipeline, which is really here at the rock hammer associated with my application. Now don't take my word for it, let's actually run this code and see what happens. We're going to run our application. Cool, now we're going to head over to<text:s/><text:soft-page-break/>our trustee HTTP file. and we're going to be playing with the todos request the post todos request that we've written here now i've already modified it so that the due date associated with their </text:p>
      <text:p text:style-name="P8"> </text:p>
      <text:p text:style-name="P9">In the sixth video of the series, we talked about how middlewares can be used to customize the application pipeline. Middlewares are a prominent feature in ASP Net Core and you'll see them referred to often. Another prominent feature in ASP Net Core and Net in general is. Dependency injection. The best way to understand dependency injection is by understanding the word dependency. Dependencies are objects that other objects can depend on an ASP net core. These are typically implemented as C classes and interfaces. Dependencies can also be referred to as services in some contexts, and that's because they are stored in what is known as the service container. Injection is the process by which a referenced dependency is resolved from the service container. This can happen either when a class is constructed or in the route handlers that we write in our user code. We'll see that in action by trying to implement our first service for our application. If we take a look at the code we've written here, we'll see that there's quite a bit of logic associated with manipulating our todos list. I wonder if we can factor that out into a common class that we can then reference via dependency injection in our application. In fact, we can. Let's try to do that now. To get started, I'm going to define an interface that represents the common functionality of our Tasks service. So let's go ahead and implement that eye task service. great this interface has some of the functionality that we discussed in video 3 we can get to dues by their ID or get the entire list of to do </text:p>
      <text:p text:style-name="P10">And register that service in our DI container for service container. This is where we're going to go back to our web application builder that we discussed earlier in this series. Remember how I said we can customize the web application host by writing code in between lines? 4:00 and 6:00 well we're gonna do that now we can register new services into our DI container by calling builder accessing the services property on the builder and invoking a method called add singleton </text:p>
      <text:p text:style-name="P11">Remember how earlier we discussed that Minimal API understands how to interpret parameters from the route pattern and from the request body? It also understands how to interpret parameters that should be resolved from the DI container. All I have to do to use an implementation of eye test service in my application. is give it an eye test service primer </text:p>
      <text:p text:style-name="Normal"><text:a xlink:href="https://learn.microsoft.com/en-us/shows/back-end-web-development-with-dotnet-for-beginners/dependency-injection-for-dotnet-apis-backend-web-development-with-dotnet-for-beginners#time=00m00s" office:target-frame-name="_blank" xlink:show="new"><text:span text:style-name="T12">00:00</text:span></text:a><text:span text:style-name="T13"> - What is dependency injection? </text:span></text:p>
      <text:p text:style-name="Normal"><text:a xlink:href="https://learn.microsoft.com/en-us/shows/back-end-web-development-with-dotnet-for-beginners/dependency-injection-for-dotnet-apis-backend-web-development-with-dotnet-for-beginners#time=01m12s" office:target-frame-name="_blank" xlink:show="new"><text:span text:style-name="T14">01:12</text:span></text:a><text:span text:style-name="T15"> - Define an interface and create a concrete implementation of the tasks service </text:span></text:p>
      <text:p text:style-name="Normal"><text:a xlink:href="https://learn.microsoft.com/en-us/shows/back-end-web-development-with-dotnet-for-beginners/dependency-injection-for-dotnet-apis-backend-web-development-with-dotnet-for-beginners#time=02m43s" office:target-frame-name="_blank" xlink:show="new"><text:span text:style-name="T16">02:43</text:span></text:a><text:span text:style-name="T17"> - Register the service in the service container </text:span></text:p>
      <text:p text:style-name="Normal"><text:a xlink:href="https://learn.microsoft.com/en-us/shows/back-end-web-development-with-dotnet-for-beginners/dependency-injection-for-dotnet-apis-backend-web-development-with-dotnet-for-beginners#time=04m12s" office:target-frame-name="_blank" xlink:show="new"><text:span text:style-name="T18">04:12</text:span></text:a><text:span text:style-name="T19"> - Use the service </text:span></text:p>
      <text:p text:style-name="Normal"><text:a xlink:href="https://learn.microsoft.com/en-us/shows/back-end-web-development-with-dotnet-for-beginners/dependency-injection-for-dotnet-apis-backend-web-development-with-dotnet-for-beginners#time=06m20s" office:target-frame-name="_blank" xlink:show="new"><text:span text:style-name="T20">06:20</text:span></text:a><text:span text:style-name="T21"> - Validate that app still works </text:span></text:p>
      <text:p text:style-name="Normal"><text:a xlink:href="https://learn.microsoft.com/en-us/shows/back-end-web-development-with-dotnet-for-beginners/dependency-injection-for-dotnet-apis-backend-web-development-with-dotnet-for-beginners#time=07m25s" office:target-frame-name="_blank" xlink:show="new"><text:span text:style-name="T22">07:25</text:span></text:a><text:span text:style-name="T23"> - Outro </text:span></text:p>
      <text:p text:style-name="P24"> </text:p>
      <text:p text:style-name="P25">We've arrived at the end of our.net beginner series on back end webdevelopmentwith.net. We've covered quite a bit of our territory in this series. First we talked about API's focusing specifically on web APIs and covered what ASP NET Core is and can help us. You in the Web API landscape. Then we dived into some code and developed an understanding of ASP, NET course hosting model and application customization. After that we started writing some code and implemented our first Web API with minimal APIs and got a quick introduction to the concept of endpoint routing with minimal APIs. From there we stepped out and started learning about fundamental ASP NET core concepts like middlewares, which allow us to implement common functionality that executes on every request that is processed by our Web API. We talked about how concepts like middlewares have analogous pairs in the notion of endpoint filters, which allow us to. Implement common logic that runs whenever a particular endpoint is being executed. And last but not least, we covered the fundamental concept of dependency injection, which allows us to implement the inversion of Control principle and implement common logic in our application into services or dependencies. The ASP Net Core will automatically manage for us in the DI container. This isn't the end of your learning with ASP NET Core and minimal APIs. You can learn much more about ASP Net Core and minimal APIs in our documentation. And NET is helpful for building front end web applications too as a companion. with this series consider checking out the front end webdevelopmentwith.net beginner series that covers building web UI with place our </text:p>
      <text:p text:style-name="P26"> </text:p>
      <text:p text:style-name="P27"> </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roman" svg:panose-1="0 0 0 0 0 0 0 0 0 0"/>
    <style:font-face style:name="Times New Roman" svg:font-family="Times New Roman" style:font-family-generic="roman" style:font-pitch="variable" svg:panose-1="2 2 6 3 5 4 5 2 3 4"/>
    <style:font-face style:name="Aptos Display" svg:font-family="Aptos Display" style:font-family-generic="roman" svg:panose-1="0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CA"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style:font-name-complex="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style:font-name-complex="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style:style style:name="Hyperlink" style:display-name="Hyperlink" style:family="text" style:parent-style-name="DefaultParagraphFont">
      <style:text-properties fo:color="#467886" style:text-underline-type="single" style:text-underline-style="solid" style:text-underline-width="auto" style:text-underline-mode="continuous"/>
    </style:style>
    <style:style style:name="UnresolvedMention" style:display-name="Unresolved Mention" style:family="text" style:parent-style-name="DefaultParagraphFon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olakunle obademi</meta:initial-creator>
    <dc:creator>olakunle obademi</dc:creator>
    <meta:creation-date>2026-07-04T14:50:00Z</meta:creation-date>
    <dc:date>2026-07-04T14:51:00Z</dc:date>
    <meta:template xlink:href="Normal.dotm" xlink:type="simple"/>
    <meta:editing-cycles>1</meta:editing-cycles>
    <meta:editing-duration>PT60S</meta:editing-duration>
    <meta:document-statistic meta:page-count="13" meta:paragraph-count="89" meta:word-count="6672" meta:character-count="44619" meta:row-count="316" meta:non-whitespace-character-count="38036"/>
  </office:meta>
</office:document-meta>
</file>