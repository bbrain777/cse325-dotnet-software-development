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style:style style:name="TableColumn2" style:family="table-column">
      <style:table-column-properties style:column-width="3.6423in"/>
    </style:style>
    <style:style style:name="TableColumn3" style:family="table-column">
      <style:table-column-properties style:column-width="3.8409in"/>
    </style:style>
    <style:style style:name="Table1" style:family="table" style:master-page-name="MP0">
      <style:table-properties style:width="7.4833in" fo:margin-left="0.0951in" table:align="left"/>
    </style:style>
    <style:style style:name="TableRow4" style:family="table-row">
      <style:table-row-properties style:min-row-height="9.6402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top="0.0277in" fo:margin-bottom="0in"/>
    </style:style>
    <style:style style:name="T10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13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14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15" style:parent-style-name="Normal" style:family="paragraph">
      <style:paragraph-properties fo:margin-top="0.0277in" fo:margin-bottom="0in"/>
    </style:style>
    <style:style style:name="T16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7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18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19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20" style:parent-style-name="ListBullet" style:list-style-name="LFO1" style:family="paragraph">
      <style:paragraph-properties fo:margin-bottom="0in" fo:margin-left="0.1701in" fo:text-indent="-0.1in">
        <style:tab-stops>
          <style:tab-stop style:type="left" style:position="0.0798in"/>
        </style:tab-stops>
      </style:paragraph-properties>
      <style:text-properties fo:font-size="10pt" style:font-size-asian="10pt" style:font-size-complex="10pt"/>
    </style:style>
    <style:style style:name="P21" style:parent-style-name="Normal" style:family="paragraph">
      <style:paragraph-properties fo:margin-top="0.0277in" fo:margin-bottom="0in"/>
    </style:style>
    <style:style style:name="T22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23" style:parent-style-name="Normal" style:family="paragraph">
      <style:paragraph-properties fo:margin-top="0.0138in" fo:margin-bottom="0in" fo:line-height="100%"/>
    </style:style>
    <style:style style:name="T2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P32" style:parent-style-name="Normal" style:family="paragraph">
      <style:paragraph-properties fo:margin-top="0.0277in" fo:margin-bottom="0in"/>
    </style:style>
    <style:style style:name="T33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34" style:parent-style-name="Normal" style:family="paragraph">
      <style:paragraph-properties fo:margin-top="0.0277in" fo:margin-bottom="0in"/>
    </style:style>
    <style:style style:name="T35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44" style:parent-style-name="Normal" style:family="paragraph">
      <style:paragraph-properties fo:margin-top="0.0138in" fo:margin-bottom="0in" fo:line-height="100%"/>
    </style:style>
    <style:style style:name="T45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P53" style:parent-style-name="Normal" style:family="paragraph">
      <style:paragraph-properties fo:margin-top="0.0277in" fo:margin-bottom="0in"/>
    </style:style>
    <style:style style:name="T54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55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56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57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58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59" style:parent-style-name="Normal" style:family="paragraph">
      <style:paragraph-properties fo:margin-top="0.0277in" fo:margin-bottom="0in"/>
    </style:style>
    <style:style style:name="T60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61" style:parent-style-name="Normal" style:family="paragraph">
      <style:paragraph-properties fo:margin-top="0.0138in" fo:margin-bottom="0in" fo:line-height="100%"/>
    </style:style>
    <style:style style:name="T62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P72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73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74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in"/>
    </style:style>
    <style:style style:name="T79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8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1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2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3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4" style:parent-style-name="Normal" style:family="paragraph">
      <style:paragraph-properties fo:margin-top="0.0277in" fo:margin-bottom="0in"/>
    </style:style>
    <style:style style:name="T85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86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7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8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89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90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91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92" style:parent-style-name="Normal" style:family="paragraph">
      <style:paragraph-properties fo:margin-top="0.0277in" fo:margin-bottom="0in"/>
    </style:style>
    <style:style style:name="T93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9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5" style:parent-style-name="Normal" style:family="paragraph">
      <style:paragraph-properties fo:margin-bottom="0in"/>
    </style:style>
    <style:style style:name="T9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97" style:parent-style-name="DefaultParagraphFont" style:family="text">
      <style:text-properties fo:font-size="10pt" style:font-size-asian="10pt" style:font-size-complex="10pt"/>
    </style:style>
    <style:style style:name="T98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P99" style:parent-style-name="Normal" style:family="paragraph">
      <style:paragraph-properties fo:margin-bottom="0in"/>
      <style:text-properties style:font-name="Consolas" style:font-name-asian="Consolas" fo:color="#0B2545" fo:font-size="10pt" style:font-size-asian="10pt" style:font-size-complex="10pt"/>
    </style:style>
    <style:style style:name="P100" style:parent-style-name="Normal" style:family="paragraph">
      <style:paragraph-properties fo:margin-top="0.0277in" fo:margin-bottom="0in"/>
    </style:style>
    <style:style style:name="T101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02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3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4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5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6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7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8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09" style:parent-style-name="ListBullet" style:list-style-name="LFO1" style:family="paragraph">
      <style:paragraph-properties fo:margin-bottom="0in"/>
      <style:text-properties fo:font-size="10pt" style:font-size-asian="10pt" style:font-size-complex="10pt"/>
    </style:style>
    <style:style style:name="P110" style:parent-style-name="Normal" style:family="paragraph">
      <style:paragraph-properties fo:margin-top="0.0277in" fo:margin-bottom="0in"/>
    </style:style>
    <style:style style:name="T111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14" style:parent-style-name="DefaultParagraphFont" style:family="text">
      <style:text-properties fo:font-size="10pt" style:font-size-asian="10pt" style:font-size-complex="10pt"/>
    </style:style>
    <style:style style:name="T115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11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20" style:parent-style-name="DefaultParagraphFont" style:family="text">
      <style:text-properties fo:font-size="10pt" style:font-size-asian="10pt" style:font-size-complex="10pt"/>
    </style:style>
    <style:style style:name="T121" style:parent-style-name="DefaultParagraphFont" style:family="text">
      <style:text-properties fo:font-size="10pt" style:font-size-asian="10pt" style:font-size-complex="10pt"/>
    </style:style>
    <style:style style:name="T122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23" style:parent-style-name="DefaultParagraphFont" style:family="text">
      <style:text-properties fo:font-size="10pt" style:font-size-asian="10pt" style:font-size-complex="10pt"/>
    </style:style>
    <style:style style:name="T12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12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27" style:parent-style-name="DefaultParagraphFont" style:family="text">
      <style:text-properties fo:font-size="10pt" style:font-size-asian="10pt" style:font-size-complex="10pt"/>
    </style:style>
    <style:style style:name="T128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29" style:parent-style-name="DefaultParagraphFont" style:family="text">
      <style:text-properties fo:font-size="10pt" style:font-size-asian="10pt" style:font-size-complex="10pt"/>
    </style:style>
    <style:style style:name="T130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31" style:parent-style-name="DefaultParagraphFont" style:family="text">
      <style:text-properties fo:font-size="10pt" style:font-size-asian="10pt" style:font-size-complex="10pt"/>
    </style:style>
    <style:style style:name="T132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P138" style:parent-style-name="Normal" style:family="paragraph">
      <style:paragraph-properties fo:margin-top="0.0277in" fo:margin-bottom="0in"/>
    </style:style>
    <style:style style:name="T139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T142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T14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45" style:parent-style-name="DefaultParagraphFont" style:family="text">
      <style:text-properties fo:font-size="10pt" style:font-size-asian="10pt" style:font-size-complex="10pt"/>
    </style:style>
    <style:style style:name="T14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ize="10pt" style:font-size-asian="10pt" style:font-size-complex="10pt"/>
    </style:style>
    <style:style style:name="T14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15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T153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277in"/>
    </style:style>
    <style:style style:name="T158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59" style:parent-style-name="Normal" style:family="paragraph">
      <style:text-properties fo:font-size="10pt" style:font-size-asian="10pt" style:font-size-complex="10pt"/>
    </style:style>
    <style:style style:name="P160" style:parent-style-name="ListBullet" style:list-style-name="LFO1" style:family="paragraph">
      <style:text-properties fo:font-size="10pt" style:font-size-asian="10pt" style:font-size-complex="10pt"/>
    </style:style>
    <style:style style:name="P161" style:parent-style-name="ListBullet" style:list-style-name="LFO1" style:family="paragraph">
      <style:text-properties fo:font-size="10pt" style:font-size-asian="10pt" style:font-size-complex="10pt"/>
    </style:style>
    <style:style style:name="P162" style:parent-style-name="ListBullet" style:list-style-name="LFO1" style:family="paragraph">
      <style:text-properties fo:font-size="10pt" style:font-size-asian="10pt" style:font-size-complex="10pt"/>
    </style:style>
    <style:style style:name="P163" style:parent-style-name="ListBullet" style:list-style-name="LFO1" style:family="paragraph">
      <style:text-properties fo:font-size="10pt" style:font-size-asian="10pt" style:font-size-complex="10pt"/>
    </style:style>
    <style:style style:name="P164" style:parent-style-name="Normal" style:family="paragraph">
      <style:paragraph-properties fo:margin-top="0.0277in"/>
    </style:style>
    <style:style style:name="T165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66" style:parent-style-name="Normal" style:family="paragraph">
      <style:paragraph-properties fo:margin-top="0.0138in" fo:margin-bottom="0.0416in" fo:line-height="100%"/>
    </style:style>
    <style:style style:name="T16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173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T175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T17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P179" style:parent-style-name="Normal" style:family="paragraph">
      <style:paragraph-properties fo:margin-top="0.0277in"/>
    </style:style>
    <style:style style:name="T180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81" style:parent-style-name="Normal" style:family="paragraph">
      <style:paragraph-properties fo:margin-top="0.0138in" fo:margin-bottom="0.0416in" fo:line-height="100%"/>
    </style:style>
    <style:style style:name="T182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83" style:parent-style-name="DefaultParagraphFont" style:family="text">
      <style:text-properties fo:font-size="10pt" style:font-size-asian="10pt" style:font-size-complex="10pt"/>
    </style:style>
    <style:style style:name="T18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85" style:parent-style-name="DefaultParagraphFont" style:family="text">
      <style:text-properties fo:font-size="10pt" style:font-size-asian="10pt" style:font-size-complex="10pt"/>
    </style:style>
    <style:style style:name="T186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187" style:parent-style-name="DefaultParagraphFont" style:family="text">
      <style:text-properties fo:font-size="10pt" style:font-size-asian="10pt" style:font-size-complex="10pt"/>
    </style:style>
    <style:style style:name="P188" style:parent-style-name="Normal" style:family="paragraph">
      <style:text-properties fo:font-size="10pt" style:font-size-asian="10pt" style:font-size-complex="10pt"/>
    </style:style>
    <style:style style:name="P189" style:parent-style-name="Normal" style:family="paragraph">
      <style:paragraph-properties fo:margin-top="0.0277in"/>
    </style:style>
    <style:style style:name="T190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91" style:parent-style-name="ListBullet" style:list-style-name="LFO1" style:family="paragraph">
      <style:text-properties fo:font-size="10pt" style:font-size-asian="10pt" style:font-size-complex="10pt"/>
    </style:style>
    <style:style style:name="P192" style:parent-style-name="ListBullet" style:list-style-name="LFO1" style:family="paragraph">
      <style:text-properties fo:font-size="10pt" style:font-size-asian="10pt" style:font-size-complex="10pt"/>
    </style:style>
    <style:style style:name="P193" style:parent-style-name="ListBullet" style:list-style-name="LFO1" style:family="paragraph">
      <style:text-properties fo:font-size="10pt" style:font-size-asian="10pt" style:font-size-complex="10pt"/>
    </style:style>
    <style:style style:name="P194" style:parent-style-name="ListBullet" style:list-style-name="LFO1" style:family="paragraph">
      <style:text-properties fo:font-size="10pt" style:font-size-asian="10pt" style:font-size-complex="10pt"/>
    </style:style>
    <style:style style:name="P195" style:parent-style-name="ListBullet" style:list-style-name="LFO1" style:family="paragraph">
      <style:text-properties fo:font-size="10pt" style:font-size-asian="10pt" style:font-size-complex="10pt"/>
    </style:style>
    <style:style style:name="P196" style:parent-style-name="Normal" style:family="paragraph">
      <style:paragraph-properties fo:margin-top="0.0277in"/>
    </style:style>
    <style:style style:name="T197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198" style:parent-style-name="Normal" style:family="paragraph">
      <style:paragraph-properties fo:margin-top="0.0138in" fo:margin-bottom="0.0416in" fo:line-height="100%"/>
    </style:style>
    <style:style style:name="T19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00" style:parent-style-name="DefaultParagraphFont" style:family="text">
      <style:text-properties fo:font-size="10pt" style:font-size-asian="10pt" style:font-size-complex="10pt"/>
    </style:style>
    <style:style style:name="T20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02" style:parent-style-name="DefaultParagraphFont" style:family="text">
      <style:text-properties fo:font-size="10pt" style:font-size-asian="10pt" style:font-size-complex="10pt"/>
    </style:style>
    <style:style style:name="T203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04" style:parent-style-name="DefaultParagraphFont" style:family="text">
      <style:text-properties fo:font-size="10pt" style:font-size-asian="10pt" style:font-size-complex="10pt"/>
    </style:style>
    <style:style style:name="T205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06" style:parent-style-name="DefaultParagraphFont" style:family="text">
      <style:text-properties fo:font-size="10pt" style:font-size-asian="10pt" style:font-size-complex="10pt"/>
    </style:style>
    <style:style style:name="P207" style:parent-style-name="Normal" style:family="paragraph">
      <style:paragraph-properties fo:margin-top="0.0277in"/>
    </style:style>
    <style:style style:name="T208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209" style:parent-style-name="ListBullet" style:list-style-name="LFO1" style:family="paragraph">
      <style:text-properties fo:font-size="10pt" style:font-size-asian="10pt" style:font-size-complex="10pt"/>
    </style:style>
    <style:style style:name="P210" style:parent-style-name="ListBullet" style:list-style-name="LFO1" style:family="paragraph">
      <style:text-properties fo:font-size="10pt" style:font-size-asian="10pt" style:font-size-complex="10pt"/>
    </style:style>
    <style:style style:name="P211" style:parent-style-name="ListBullet" style:list-style-name="LFO1" style:family="paragraph">
      <style:text-properties fo:font-size="10pt" style:font-size-asian="10pt" style:font-size-complex="10pt"/>
    </style:style>
    <style:style style:name="P212" style:parent-style-name="ListBullet" style:list-style-name="LFO1" style:family="paragraph">
      <style:text-properties fo:font-size="10pt" style:font-size-asian="10pt" style:font-size-complex="10pt"/>
    </style:style>
    <style:style style:name="P213" style:parent-style-name="Normal" style:family="paragraph">
      <style:paragraph-properties fo:margin-top="0.0138in" fo:margin-bottom="0.0416in" fo:line-height="100%"/>
    </style:style>
    <style:style style:name="T214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15" style:parent-style-name="DefaultParagraphFont" style:family="text">
      <style:text-properties fo:font-size="10pt" style:font-size-asian="10pt" style:font-size-complex="10pt"/>
    </style:style>
    <style:style style:name="T216" style:parent-style-name="DefaultParagraphFont" style:family="text">
      <style:text-properties fo:font-size="10pt" style:font-size-asian="10pt" style:font-size-complex="10pt"/>
    </style:style>
    <style:style style:name="T217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18" style:parent-style-name="DefaultParagraphFont" style:family="text">
      <style:text-properties fo:font-size="10pt" style:font-size-asian="10pt" style:font-size-complex="10pt"/>
    </style:style>
    <style:style style:name="T219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20" style:parent-style-name="DefaultParagraphFont" style:family="text">
      <style:text-properties fo:font-size="10pt" style:font-size-asian="10pt" style:font-size-complex="10pt"/>
    </style:style>
    <style:style style:name="T221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22" style:parent-style-name="DefaultParagraphFont" style:family="text">
      <style:text-properties fo:font-size="10pt" style:font-size-asian="10pt" style:font-size-complex="10pt"/>
    </style:style>
    <style:style style:name="T223" style:parent-style-name="DefaultParagraphFont" style:family="text">
      <style:text-properties style:font-name="Consolas" style:font-name-asian="Consolas" fo:color="#0B2545" fo:font-size="10pt" style:font-size-asian="10pt" style:font-size-complex="10pt"/>
    </style:style>
    <style:style style:name="T224" style:parent-style-name="DefaultParagraphFont" style:family="text">
      <style:text-properties fo:font-size="10pt" style:font-size-asian="10pt" style:font-size-complex="10pt"/>
    </style:style>
    <style:style style:name="P225" style:parent-style-name="Normal" style:family="paragraph">
      <style:paragraph-properties fo:margin-top="0.0277in"/>
    </style:style>
    <style:style style:name="T226" style:parent-style-name="DefaultParagraphFont" style:family="text">
      <style:text-properties fo:font-weight="bold" style:font-weight-asian="bold" fo:color="#1F4D78" fo:font-size="10pt" style:font-size-asian="10pt" style:font-size-complex="10pt"/>
    </style:style>
    <style:style style:name="P227" style:parent-style-name="ListBullet" style:list-style-name="LFO1" style:family="paragraph">
      <style:text-properties fo:font-size="10pt" style:font-size-asian="10pt" style:font-size-complex="10pt"/>
    </style:style>
    <style:style style:name="P228" style:parent-style-name="ListBullet" style:list-style-name="LFO1" style:family="paragraph">
      <style:text-properties fo:font-size="10pt" style:font-size-asian="10pt" style:font-size-complex="10pt"/>
    </style:style>
    <style:style style:name="P229" style:parent-style-name="ListBullet" style:list-style-name="LFO1" style:family="paragraph">
      <style:text-properties fo:font-size="10pt" style:font-size-asian="10pt" style:font-size-complex="10pt"/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top="0.0277in"/>
    </style:style>
    <style:style style:name="T233" style:parent-style-name="DefaultParagraphFont" style:family="text">
      <style:text-properties fo:font-weight="bold" style:font-weight-asian="bold" fo:color="#1F4D78" fo:font-size="9.5pt" style:font-size-asian="9.5pt"/>
    </style:style>
    <style:style style:name="P234" style:parent-style-name="Normal" style:family="paragraph">
      <style:paragraph-properties fo:margin-top="0.0277in"/>
    </style:style>
    <style:style style:name="T235" style:parent-style-name="DefaultParagraphFont" style:family="text">
      <style:text-properties fo:font-weight="bold" style:font-weight-asian="bold" fo:color="#1F4D78" fo:font-size="9.5pt" style:font-size-asian="9.5pt"/>
    </style:style>
    <style:style style:name="P236" style:parent-style-name="Normal" style:family="paragraph">
      <style:paragraph-properties fo:margin-bottom="0.0416in" fo:line-height="100%"/>
    </style:style>
    <style:style style:name="T237" style:parent-style-name="DefaultParagraphFont" style:family="text">
      <style:text-properties style:font-name="Consolas" style:font-name-asian="Consolas" fo:color="#0B2545" fo:font-size="7pt" style:font-size-asian="7pt"/>
    </style:style>
    <style:style style:name="T238" style:parent-style-name="DefaultParagraphFont" style:family="text">
      <style:text-properties style:font-name="Consolas" style:font-name-asian="Consolas" fo:color="#0B2545" fo:font-size="7pt" style:font-size-asian="7pt"/>
    </style:style>
    <style:style style:name="T239" style:parent-style-name="DefaultParagraphFont" style:family="text">
      <style:text-properties style:font-name="Consolas" style:font-name-asian="Consolas" fo:color="#0B2545" fo:font-size="7pt" style:font-size-asian="7pt"/>
    </style:style>
    <style:style style:name="T240" style:parent-style-name="DefaultParagraphFont" style:family="text">
      <style:text-properties style:font-name="Consolas" style:font-name-asian="Consolas" fo:color="#0B2545" fo:font-size="7pt" style:font-size-asian="7pt"/>
    </style:style>
    <style:style style:name="P241" style:parent-style-name="Normal" style:family="paragraph">
      <style:paragraph-properties fo:margin-top="0.0277in"/>
    </style:style>
    <style:style style:name="T242" style:parent-style-name="DefaultParagraphFont" style:family="text">
      <style:text-properties fo:font-weight="bold" style:font-weight-asian="bold" fo:color="#1F4D78" fo:font-size="9.5pt" style:font-size-asian="9.5pt"/>
    </style:style>
    <style:style style:name="P243" style:parent-style-name="Normal" style:family="paragraph">
      <style:paragraph-properties fo:margin-top="0.0277in"/>
    </style:style>
    <style:style style:name="T244" style:parent-style-name="DefaultParagraphFont" style:family="text">
      <style:text-properties style:font-name="Consolas" style:font-name-asian="Consolas" fo:color="#0B2545" fo:font-size="7pt" style:font-size-asian="7pt"/>
    </style:style>
    <style:style style:name="T245" style:parent-style-name="DefaultParagraphFont" style:family="text">
      <style:text-properties style:font-name="Consolas" style:font-name-asian="Consolas" fo:color="#0B2545" fo:font-size="7pt" style:font-size-asian="7pt"/>
    </style:style>
    <style:style style:name="T246" style:parent-style-name="DefaultParagraphFont" style:family="text">
      <style:text-properties style:font-name="Consolas" style:font-name-asian="Consolas" fo:color="#0B2545" fo:font-size="7pt" style:font-size-asian="7pt"/>
    </style:style>
    <style:style style:name="T247" style:parent-style-name="DefaultParagraphFont" style:family="text">
      <style:text-properties style:font-name="Consolas" style:font-name-asian="Consolas" fo:color="#0B2545" fo:font-size="7pt" style:font-size-asian="7pt"/>
    </style:style>
    <style:style style:name="T248" style:parent-style-name="DefaultParagraphFont" style:family="text">
      <style:text-properties fo:font-weight="bold" style:font-weight-asian="bold" fo:color="#1F4D78" fo:font-size="9.5pt" style:font-size-asian="9.5pt"/>
    </style:style>
    <style:style style:name="P249" style:parent-style-name="Normal" style:family="paragraph">
      <style:paragraph-properties fo:margin-top="0.0277in"/>
    </style:style>
    <style:style style:name="T250" style:parent-style-name="DefaultParagraphFont" style:family="text">
      <style:text-properties fo:font-weight="bold" style:font-weight-asian="bold" fo:color="#1F4D78" fo:font-size="9.5pt" style:font-size-asian="9.5pt"/>
    </style:style>
    <style:style style:name="P251" style:parent-style-name="Normal" style:family="paragraph">
      <style:paragraph-properties fo:margin-top="0.0277in"/>
    </style:style>
    <style:style style:name="T252" style:parent-style-name="DefaultParagraphFont" style:family="text">
      <style:text-properties fo:font-weight="bold" style:font-weight-asian="bold" fo:color="#1F4D78" fo:font-size="9.5pt" style:font-size-asian="9.5pt"/>
    </style:style>
    <style:style style:name="P253" style:parent-style-name="Normal" style:family="paragraph">
      <style:paragraph-properties fo:margin-top="0.0277in"/>
    </style:style>
    <style:style style:name="T254" style:parent-style-name="DefaultParagraphFont" style:family="text">
      <style:text-properties fo:font-weight="bold" style:font-weight-asian="bold" fo:color="#1F4D78" fo:font-size="9.5pt" style:font-size-asian="9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0">Week 1 Purpose</text:span></text:p>
            <text:p text:style-name="P11">Week 1 checks that your development environment works and that you can build simple .NET applications.</text:p>
            <text:list text:style-name="LFO1" text:continue-numbering="true">
              <text:list-item>
                <text:p text:style-name="P12">Console app: read files, process data, write a report.</text:p>
              </text:list-item>
              <text:list-item>
                <text:p text:style-name="P13">Web API: create endpoints for pizza CRUD operations.</text:p>
              </text:list-item>
              <text:list-item>
                <text:p text:style-name="P14">Team activity: organize communication and prepare for the group project.</text:p>
              </text:list-item>
            </text:list>
            <text:p text:style-name="P15"><text:span text:style-name="T16">Tools To Have Ready</text:span></text:p>
            <text:list text:style-name="LFO1" text:continue-numbering="true">
              <text:list-item>
                <text:p text:style-name="P17">VS Code with C# extension and C# Dev Kit.</text:p>
              </text:list-item>
              <text:list-item>
                <text:p text:style-name="P18">.NET SDK 8 LTS; this workspace uses SDK 8.0.422 in global.json.</text:p>
              </text:list-item>
              <text:list-item>
                <text:p text:style-name="P19">Git for source control and GitHub for online repository work.</text:p>
              </text:list-item>
              <text:list-item>
                <text:p text:style-name="P20">MS Teams for group communication and Trello for project tracking.</text:p>
              </text:list-item>
            </text:list>
            <text:p text:style-name="P21"><text:span text:style-name="T22">Environment Check Commands</text:span></text:p>
            <text:p text:style-name="P23"><text:span text:style-name="T24">dotnet --version</text:span><text:span text:style-name="T25"><text:line-break/></text:span><text:span text:style-name="T26">dotnet --list-sdks</text:span><text:span text:style-name="T27"><text:line-break/></text:span><text:span text:style-name="T28">git --version</text:span><text:span text:style-name="T29"><text:line-break/></text:span><text:span text:style-name="T30">git config --global --list</text:span><text:span text:style-name="T31"><text:line-break/></text:span></text:p>
            <text:p text:style-name="P32"><text:span text:style-name="T33">Main Week 1 Folder</text:span></text:p>
            <text:p text:style-name="P34"><text:span text:style-name="T35">week01/</text:span><text:span text:style-name="T36"><text:line-break/></text:span><text:span text:style-name="T37"><text:s text:c="2"/>Week01Assignment.sln</text:span><text:span text:style-name="T38"><text:line-break/></text:span><text:span text:style-name="T39"><text:s text:c="2"/>SalesSummary/</text:span><text:span text:style-name="T40"><text:line-break/></text:span><text:span text:style-name="T41"><text:s text:c="2"/>PizzaApi/</text:span><text:span text:style-name="T42"><text:line-break/></text:span><text:span text:style-name="T43">Core dotnet Commands</text:span></text:p>
            <text:p text:style-name="P44"><text:span text:style-name="T45">cd week01</text:span><text:span text:style-name="T46"><text:line-break/></text:span><text:span text:style-name="T47">dotnet build Week01Assignment.sln</text:span><text:span text:style-name="T48"><text:line-break/></text:span><text:span text:style-name="T49">dotnet run --project SalesSummary</text:span><text:span text:style-name="T50"><text:line-break/></text:span><text:span text:style-name="T51">dotnet run --project PizzaApi</text:span><text:span text:style-name="T52"><text:line-break/></text:span></text:p>
            <text:p text:style-name="P53"><text:span text:style-name="T54">What Is .NET?</text:span></text:p>
            <text:list text:style-name="LFO1" text:continue-numbering="true">
              <text:list-item>
                <text:p text:style-name="P55">.NET is Microsoft's development platform for building apps.</text:p>
              </text:list-item>
              <text:list-item>
                <text:p text:style-name="P56">C# is the main language used in this course.</text:p>
              </text:list-item>
              <text:list-item>
                <text:p text:style-name="P57">A solution can contain multiple projects.</text:p>
              </text:list-item>
              <text:list-item>
                <text:p text:style-name="P58">A project contains source files, dependencies, and build settings.</text:p>
              </text:list-item>
            </text:list>
            <text:p text:style-name="P59"><text:span text:style-name="T60">C# Fast Reminders</text:span></text:p>
            <text:p text:style-name="P61"><text:span text:style-name="T62">int id = 1;</text:span><text:span text:style-name="T63"><text:line-break/></text:span><text:span text:style-name="T64">decimal total = 0;</text:span><text:span text:style-name="T65"><text:line-break/></text:span><text:span text:style-name="T66">bool active = true;</text:span><text:span text:style-name="T67"><text:line-break/></text:span><text:span text:style-name="T68">string name = "Pizza";</text:span><text:span text:style-name="T69"><text:line-break/></text:span><text:span text:style-name="T70">var count = 3;</text:span><text:span text:style-name="T71"><text:line-break/></text:span></text:p>
            <text:list text:style-name="LFO1" text:continue-numbering="true">
              <text:list-item>
                <text:p text:style-name="P72">Use decimal for money.</text:p>
              </text:list-item>
              <text:list-item>
                <text:p text:style-name="P73">Use string for text.</text:p>
              </text:list-item>
              <text:list-item>
                <text:p text:style-name="P74">Use bool for true/false.</text:p>
              </text:list-item>
            </text:list>
            <text:p text:style-name="P75"><text:span text:style-name="T76">Use var when the assigned value makes the type obvious.</text:span></text:p>
          </table:table-cell>
          <table:table-cell table:style-name="TableCell77">
            <text:p text:style-name="P78"><text:span text:style-name="T79">SalesSummary Project</text:span></text:p>
            <text:p text:style-name="P80">This is the console app. It reads CSV sales files, totals the money, and writes a text report.</text:p>
            <text:list text:style-name="LFO1" text:continue-numbering="true">
              <text:list-item>
                <text:p text:style-name="P81">Input folder: week01/Data/SalesFiles</text:p>
              </text:list-item>
              <text:list-item>
                <text:p text:style-name="P82">Output file: week01/Data/sales-summary.txt</text:p>
              </text:list-item>
              <text:list-item>
                <text:p text:style-name="P83">Main file: week01/SalesSummary/Program.cs</text:p>
              </text:list-item>
            </text:list>
            <text:p text:style-name="P84"><text:span text:style-name="T85">File/Directory APIs</text:span></text:p>
            <text:list text:style-name="LFO1" text:continue-numbering="true">
              <text:list-item>
                <text:p text:style-name="P86">Directory.CreateDirectory: make sure a folder exists.</text:p>
              </text:list-item>
              <text:list-item>
                <text:p text:style-name="P87">Directory.EnumerateFiles: find files matching a pattern.</text:p>
              </text:list-item>
              <text:list-item>
                <text:p text:style-name="P88">Path.Combine: build safe paths.</text:p>
              </text:list-item>
              <text:list-item>
                <text:p text:style-name="P89">Path.GetFileName: get only the file name.</text:p>
              </text:list-item>
              <text:list-item>
                <text:p text:style-name="P90">File.ReadLines: read a file line by line.</text:p>
              </text:list-item>
              <text:list-item>
                <text:p text:style-name="P91">File.WriteAllText: write final text to a file.</text:p>
              </text:list-item>
            </text:list>
            <text:p text:style-name="P92"><text:span text:style-name="T93">Why Path.Combine?</text:span></text:p>
            <text:p text:style-name="P94">It avoids broken paths and works better across different operating systems.</text:p>
            <text:p text:style-name="P95"><text:span text:style-name="T96">var salesPath = Path.Combine("Data", "SalesFiles");</text:span><text:span text:style-name="T97"><text:line-break/></text:span><text:span text:style-name="T98">var reportPath = Path.Combine("Data", "sales-summary.txt");</text:span></text:p>
            <text:p text:style-name="P99"/>
            <text:p text:style-name="P100"><text:span text:style-name="T101">Sales Report Algorithm</text:span></text:p>
            <text:list text:style-name="LFO1" text:continue-numbering="true">
              <text:list-item>
                <text:p text:style-name="P102">Create the Data directory if needed.</text:p>
              </text:list-item>
              <text:list-item>
                <text:p text:style-name="P103">Find all .csv files in SalesFiles.</text:p>
              </text:list-item>
              <text:list-item>
                <text:p text:style-name="P104">For each file, skip the first/header line.</text:p>
              </text:list-item>
              <text:list-item>
                <text:p text:style-name="P105">Split each data line into Product and Amount.</text:p>
              </text:list-item>
              <text:list-item>
                <text:p text:style-name="P106">Parse the amount as decimal.</text:p>
              </text:list-item>
              <text:list-item>
                <text:p text:style-name="P107">Add each file's total to the grand total.</text:p>
              </text:list-item>
              <text:list-item>
                <text:p text:style-name="P108">Use StringBuilder to build the report.</text:p>
              </text:list-item>
              <text:list-item>
                <text:p text:style-name="P109">Write the report to sales-summary.txt.</text:p>
              </text:list-item>
            </text:list>
            <text:p text:style-name="P110"><text:span text:style-name="T111">Important Parsing Pattern</text:span></text:p>
            <text:p text:style-name="P112"><text:span text:style-name="T113">foreach (var line in File.ReadLines(path).Skip(1))</text:span><text:span text:style-name="T114"><text:line-break/></text:span><text:span text:style-name="T115">{</text:span><text:span text:style-name="T116"><text:line-break/></text:span><text:span text:style-name="T117"><text:s text:c="4"/>var columns = line.Split(',', 2);</text:span><text:span text:style-name="T118"><text:line-break/></text:span><text:span text:style-name="T119"><text:s text:c="4"/>var amountText = columns[1].Trim();</text:span><text:span text:style-name="T120"><text:line-break/></text:span><text:span text:style-name="T121"><text:line-break/></text:span><text:span text:style-name="T122"><text:s text:c="4"/>if (decimal.TryParse(amountText,</text:span><text:span text:style-name="T123"><text:line-break/></text:span><text:span text:style-name="T124"><text:s text:c="8"/>NumberStyles.Currency,</text:span><text:span text:style-name="T125"><text:line-break/></text:span><text:span text:style-name="T126"><text:s text:c="8"/>CultureInfo.InvariantCulture,</text:span><text:span text:style-name="T127"><text:line-break/></text:span><text:span text:style-name="T128"><text:s text:c="8"/>out var amount))</text:span><text:span text:style-name="T129"><text:line-break/></text:span><text:span text:style-name="T130"><text:s text:c="4"/>{</text:span><text:span text:style-name="T131"><text:line-break/></text:span><text:span text:style-name="T132"><text:s text:c="8"/>fileTotal += amount;</text:span><text:span text:style-name="T133"><text:line-break/></text:span><text:span text:style-name="T134"><text:s text:c="4"/>}</text:span><text:span text:style-name="T135"><text:line-break/></text:span><text:span text:style-name="T136">}</text:span><text:span text:style-name="T137"><text:line-break/></text:span></text:p>
            <text:p text:style-name="P138"><text:span text:style-name="T139">Report Shape</text:span></text:p>
            <text:p text:style-name="P140"><text:span text:style-name="T141"><text:line-break/></text:span><text:span text:style-name="T142">Sales Summary</text:span><text:span text:style-name="T143"><text:line-break/></text:span><text:span text:style-name="T144">-------------------------</text:span><text:span text:style-name="T145"><text:line-break/></text:span><text:span text:style-name="T146">Total Sales: $73.23</text:span><text:span text:style-name="T147"><text:line-break/></text:span><text:span text:style-name="T148"><text:line-break/></text:span><text:span text:style-name="T149">Details:</text:span><text:span text:style-name="T150"><text:line-break/></text:span><text:span text:style-name="T151">pizza-sales.csv: $61.48</text:span><text:span text:style-name="T152"><text:line-break/></text:span><text:soft-page-break/><text:span text:style-name="T153">side-sales.csv: $11.75</text:span><text:span text:style-name="T154"><text:line-break/></text:span></text:p>
          </table:table-cell>
        </table:table-row>
        <text:soft-page-break/>
        <table:table-row table:style-name="TableRow155">
          <table:table-cell table:style-name="TableCell156">
            <text:p text:style-name="P157"><text:span text:style-name="T158">PizzaApi Project</text:span></text:p>
            <text:p text:style-name="P159">This is an ASP.NET Core Web API. It receives HTTP requests and returns HTTP responses.</text:p>
            <text:list text:style-name="LFO1" text:continue-numbering="true">
              <text:list-item>
                <text:p text:style-name="P160">Controller: PizzaController.cs</text:p>
              </text:list-item>
              <text:list-item>
                <text:p text:style-name="P161">Model: Pizza.cs</text:p>
              </text:list-item>
              <text:list-item>
                <text:p text:style-name="P162">Route base: /api/pizza</text:p>
              </text:list-item>
              <text:list-item>
                <text:p text:style-name="P163">Data storage: static in-memory List&lt;Pizza&gt;.</text:p>
              </text:list-item>
            </text:list>
            <text:p text:style-name="P164"><text:span text:style-name="T165">Model Shape</text:span></text:p>
            <text:p text:style-name="P166"><text:span text:style-name="T167">public class Pizza</text:span><text:span text:style-name="T168"><text:line-break/></text:span><text:span text:style-name="T169">{</text:span><text:span text:style-name="T170"><text:line-break/></text:span><text:span text:style-name="T171"><text:s text:c="4"/>public int Id { get; set; }</text:span><text:span text:style-name="T172"><text:line-break/></text:span><text:span text:style-name="T173"><text:s text:c="4"/>public string? Name { get; set; }</text:span><text:span text:style-name="T174"><text:line-break/></text:span><text:span text:style-name="T175"><text:s text:c="4"/>public bool IsGlutenFree { get; set; }</text:span><text:span text:style-name="T176"><text:line-break/></text:span><text:span text:style-name="T177">}</text:span><text:span text:style-name="T178"><text:line-break/></text:span></text:p>
            <text:p text:style-name="P179"><text:span text:style-name="T180">Controller Attributes</text:span></text:p>
            <text:p text:style-name="P181"><text:span text:style-name="T182">[ApiController]</text:span><text:span text:style-name="T183"><text:line-break/></text:span><text:span text:style-name="T184">[Route("api/[controller]")]</text:span><text:span text:style-name="T185"><text:line-break/></text:span><text:span text:style-name="T186">public class PizzaController : ControllerBase</text:span><text:span text:style-name="T187"><text:line-break/></text:span></text:p>
            <text:p text:style-name="P188">[controller] becomes pizza because the class is PizzaController.</text:p>
            <text:p text:style-name="P189"><text:span text:style-name="T190">CRUD Routes</text:span></text:p>
            <text:list text:style-name="LFO1" text:continue-numbering="true">
              <text:list-item>
                <text:p text:style-name="P191">GET /api/pizza: read all pizzas.</text:p>
              </text:list-item>
              <text:list-item>
                <text:p text:style-name="P192">GET /api/pizza/1: read one pizza.</text:p>
              </text:list-item>
              <text:list-item>
                <text:p text:style-name="P193">POST /api/pizza: create a pizza.</text:p>
              </text:list-item>
              <text:list-item>
                <text:p text:style-name="P194">PUT /api/pizza/4: update pizza 4.</text:p>
              </text:list-item>
              <text:list-item>
                <text:p text:style-name="P195">DELETE /api/pizza/4: delete pizza 4.</text:p>
              </text:list-item>
            </text:list>
            <text:p text:style-name="P196"><text:span text:style-name="T197">JSON Body</text:span></text:p>
            <text:p text:style-name="P198"><text:span text:style-name="T199">{</text:span><text:span text:style-name="T200"><text:line-break/></text:span><text:span text:style-name="T201"><text:s text:c="2"/>"name": "Hawaiian",</text:span><text:span text:style-name="T202"><text:line-break/></text:span><text:span text:style-name="T203"><text:s text:c="2"/>"isGlutenFree": false</text:span><text:span text:style-name="T204"><text:line-break/></text:span><text:span text:style-name="T205">}</text:span><text:span text:style-name="T206"><text:line-break/></text:span></text:p>
            <text:p text:style-name="P207"><text:span text:style-name="T208">Controller Pattern</text:span></text:p>
            <text:list text:style-name="LFO1" text:continue-numbering="true">
              <text:list-item>
                <text:p text:style-name="P209">Find the item with FirstOrDefault.</text:p>
              </text:list-item>
              <text:list-item>
                <text:p text:style-name="P210">If the item is null, return NotFound().</text:p>
              </text:list-item>
              <text:list-item>
                <text:p text:style-name="P211">If found, perform the action.</text:p>
              </text:list-item>
              <text:list-item>
                <text:p text:style-name="P212">Return the right HTTP status code.</text:p>
              </text:list-item>
            </text:list>
            <text:p text:style-name="P213"><text:span text:style-name="T214">var pizza = Pizzas.FirstOrDefault(p =&gt; p.Id == id);</text:span><text:span text:style-name="T215"><text:line-break/></text:span><text:span text:style-name="T216"><text:line-break/></text:span><text:span text:style-name="T217">if (pizza is null)</text:span><text:span text:style-name="T218"><text:line-break/></text:span><text:span text:style-name="T219">{</text:span><text:span text:style-name="T220"><text:line-break/></text:span><text:span text:style-name="T221"><text:s text:c="4"/>return NotFound();</text:span><text:span text:style-name="T222"><text:line-break/></text:span><text:span text:style-name="T223">}</text:span><text:span text:style-name="T224"><text:line-break/></text:span></text:p>
            <text:p text:style-name="P225"><text:span text:style-name="T226">Status Codes</text:span></text:p>
            <text:list text:style-name="LFO1" text:continue-numbering="true">
              <text:list-item>
                <text:p text:style-name="P227">200 OK: request worked and usually returns data.</text:p>
              </text:list-item>
              <text:list-item>
                <text:p text:style-name="P228">201 Created: POST created a new item.</text:p>
              </text:list-item>
              <text:list-item>
                <text:p text:style-name="P229">204 No Content: update/delete worked; no body returned.</text:p>
              </text:list-item>
            </text:list>
            <text:soft-page-break/>
            <text:p text:style-name="Normal"><text:span text:style-name="T230">404 Not Found: requested item does not exist.</text:span></text:p>
          </table:table-cell>
          <table:table-cell table:style-name="TableCell231">
            <text:p text:style-name="Normal"/>
            <text:p text:style-name="P232"><text:span text:style-name="T233">Assignment Evidence Checklist</text:span></text:p>
            <text:p text:style-name="Normal">The Week 1 assignment is not only about writing code. You also need proof that the code works.</text:p>
            <text:list text:style-name="LFO1" text:continue-numbering="true">
              <text:list-item>
                <text:p text:style-name="ListBullet">Repository link: submit the GitHub repo that contains your working Week 1 code.</text:p>
              </text:list-item>
              <text:list-item>
                <text:p text:style-name="ListBullet">Notes document: include short evidence for the Web API and the sales summary function.</text:p>
              </text:list-item>
              <text:list-item>
                <text:p text:style-name="ListBullet">API evidence: show existing pizza records and the extra record you added.</text:p>
              </text:list-item>
              <text:list-item>
                <text:p text:style-name="ListBullet">Status evidence: include GET, POST, PUT, and DELETE results with returned status codes.</text:p>
              </text:list-item>
              <text:list-item>
                <text:p text:style-name="ListBullet">Sales evidence: include the working CreateSalesSummaryReport function.</text:p>
              </text:list-item>
            </text:list>
            <text:p text:style-name="P234"><text:span text:style-name="T235">What Your API Evidence Can Say</text:span></text:p>
            <text:p text:style-name="P236"><text:span text:style-name="T237">GET /api/pizza returned 3 starting records.</text:span><text:line-break/><text:span text:style-name="T238">POST /api/pizza created id 4 for Hawaiian.</text:span><text:line-break/><text:span text:style-name="T239">PUT /api/pizza/4 returned 204 No Content.</text:span><text:line-break/><text:span text:style-name="T240">DELETE /api/pizza/4 returned 204 No Content.</text:span><text:line-break/></text:p>
            <text:p text:style-name="P241"><text:span text:style-name="T242">Git and Repository Safety</text:span></text:p>
            <text:list text:style-name="LFO1" text:continue-numbering="true">
              <text:list-item>
                <text:p text:style-name="ListBullet">Run git status before submitting so you know what changed.</text:p>
              </text:list-item>
              <text:list-item>
                <text:p text:style-name="ListBullet">Commit with a clear message such as Complete Week 1 assignment.</text:p>
              </text:list-item>
              <text:list-item>
                <text:p text:style-name="ListBullet">Push before the due date so GitHub has the latest work.</text:p>
              </text:list-item>
              <text:list-item>
                <text:p text:style-name="ListBullet">Do not commit passwords, API keys, private notes, or connection strings.</text:p>
              </text:list-item>
            </text:list>
            <text:p text:style-name="P243"><text:span text:style-name="T244">git status</text:span><text:line-break/><text:span text:style-name="T245">git add .</text:span><text:line-break/><text:span text:style-name="T246">git commit -m "Complete week 1 assignment"</text:span><text:line-break/><text:span text:style-name="T247">git push</text:span><text:line-break/><text:span text:style-name="T248">Team Activity Details</text:span></text:p>
            <text:p text:style-name="Normal">The W01 team activity asks for organization details, not the final project itself.</text:p>
            <text:list text:style-name="LFO1" text:continue-numbering="true">
              <text:list-item>
                <text:p text:style-name="ListBullet">MS Teams: confirm you subscribed, turned on notifications, and posted.</text:p>
              </text:list-item>
              <text:list-item>
                <text:p text:style-name="ListBullet">Group name: SoloStack .NET.</text:p>
              </text:list-item>
              <text:list-item>
                <text:p text:style-name="ListBullet">Meeting time/platform: 6:00 PM UK time via MS Teams.</text:p>
              </text:list-item>
              <text:list-item>
                <text:p text:style-name="ListBullet">Next leader: Olakunle Obademi for Week 02.</text:p>
              </text:list-item>
              <text:list-item>
                <text:p text:style-name="ListBullet">Preparation: state that you reviewed the group project description.</text:p>
              </text:list-item>
              <text:list-item>
                <text:p text:style-name="ListBullet">If still alone: contact the instructor or TA about joining an active group.</text:p>
              </text:list-item>
            </text:list>
            <text:p text:style-name="P249"><text:span text:style-name="T250">Useful Submission Sentence</text:span></text:p>
            <text:p text:style-name="Normal">I reviewed the group project description so I am prepared for next week's group work and meeting. Since I am currently the only person in the group, I will serve as the Week 02 group leader and continue organizing the work. If no additional group members join, I plan to contact the instructor or TA about joining another active group so I can fully participate in the required team collaboration.</text:p>
            <text:p text:style-name="P251"><text:span text:style-name="T252">Emergency Debug Checks</text:span></text:p>
            <text:list text:style-name="LFO1" text:continue-numbering="true">
              <text:list-item>
                <text:p text:style-name="ListBullet">If dotnet fails: check folder, SDK version, restore, and build.</text:p>
              </text:list-item>
              <text:list-item>
                <text:p text:style-name="ListBullet">If SalesSummary fails: check CSV location, header row, amount values, and output path.</text:p>
              </text:list-item>
              <text:list-item>
                <text:p text:style-name="ListBullet">If PizzaApi fails: check the port, route /api/pizza, HTTP method, and JSON body.</text:p>
              </text:list-item>
              <text:list-item>
                <text:p text:style-name="ListBullet">If Git fails: check git status, remote URL, branch, and whether files were added.</text:p>
              </text:list-item>
            </text:list>
            <text:p text:style-name="P253"><text:span text:style-name="T254">Final Memory Hook</text:span></text:p>
            <text:p text:style-name="Normal">Console app pattern: find files, read data, calculate totals, write a report. Web API pattern: receive request, find item, return NotFound if missing, perform action, return the correct status cod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0277in" fo:line-height="105%"/>
      <style:text-properties style:font-name="Calibri" style:font-name-asian="Calibri" style:letter-kerning="false" fo:font-size="8pt" style:font-size-asian="8pt" style:font-size-complex="11pt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Bullet" style:display-name="List Bullet" style:family="paragraph" style:parent-style-name="Normal" style:list-style-name="LFO1">
      <style:paragraph-properties style:contextual-spacing="true" fo:margin-bottom="0.0138in" fo:line-height="100%" fo:margin-left="0in" fo:text-indent="0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letter-kerning="false" fo:font-size="8pt" style:font-size-asian="8pt" style:font-size-complex="11pt"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letter-kerning="false" fo:font-size="8pt" style:font-size-asian="8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2479in" fo:margin-bottom="0.4916in" fo:margin-right="0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58in"/>
      </style:header-style>
      <style:footer-style>
        <style:header-footer-properties style:dynamic-spacing="true" fo:min-height="-0.2437in"/>
      </style:footer-style>
    </style:page-layout>
    <style:style style:name="T7" style:parent-style-name="DefaultParagraphFont" style:family="text">
      <style:text-properties fo:font-weight="bold" style:font-weight-asian="bold" fo:color="#0B2545" fo:font-size="10pt" style:font-size-asian="10pt" style:font-size-complex="10pt"/>
    </style:style>
    <style:style style:name="T8" style:parent-style-name="DefaultParagraphFont" style:family="text">
      <style:text-properties fo:font-weight="bold" style:font-weight-asian="bold" fo:color="#0B2545" fo:font-size="10pt" style:font-size-asian="10pt" style:font-size-complex="10pt"/>
    </style:style>
    <style:style style:name="T9" style:parent-style-name="DefaultParagraphFont" style:family="text">
      <style:text-properties fo:font-weight="bold" style:font-weight-asian="bold" fo:color="#0B2545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Normal"><text:span text:style-name="T7">CSE 325</text:span><text:span text:style-name="T8">_DotNet Software Development <text:s text:c="8"/></text:span><text:span text:style-name="T9"><text:s/>Week 1 Emergency Refresher</text:span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akunle obademi</meta:initial-creator>
    <dc:creator>olakunle obademi</dc:creator>
    <meta:creation-date>2026-07-03T13:10:00Z</meta:creation-date>
    <dc:date>2026-07-03T13:40:00Z</dc:date>
    <meta:print-date>2026-07-03T13:26:00Z</meta:print-date>
    <meta:template xlink:href="Normal.dotm" xlink:type="simple"/>
    <meta:editing-cycles>1</meta:editing-cycles>
    <meta:editing-duration>PT1200S</meta:editing-duration>
    <meta:document-statistic meta:page-count="4" meta:paragraph-count="13" meta:word-count="988" meta:character-count="6610" meta:row-count="46" meta:non-whitespace-character-count="5635"/>
  </office:meta>
</office:document-meta>
</file>